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ptos Narrow" svg:font-family="'Aptos Narrow'"/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51.7pt"/>
    </style:style>
    <style:style style:name="co2" style:family="table-column">
      <style:table-column-properties fo:break-before="auto" style:column-width="50.4pt"/>
    </style:style>
    <style:style style:name="co3" style:family="table-column">
      <style:table-column-properties fo:break-before="auto" style:column-width="57.4pt"/>
    </style:style>
    <style:style style:name="co4" style:family="table-column">
      <style:table-column-properties fo:break-before="auto" style:column-width="72.71pt"/>
    </style:style>
    <style:style style:name="co5" style:family="table-column">
      <style:table-column-properties fo:break-before="auto" style:column-width="43.99pt"/>
    </style:style>
    <style:style style:name="co6" style:family="table-column">
      <style:table-column-properties fo:break-before="auto" style:column-width="64.46pt"/>
    </style:style>
    <style:style style:name="co7" style:family="table-column">
      <style:table-column-properties fo:break-before="auto" style:column-width="63.81pt"/>
    </style:style>
    <style:style style:name="co8" style:family="table-column">
      <style:table-column-properties fo:break-before="auto" style:column-width="58.71pt"/>
    </style:style>
    <style:style style:name="co9" style:family="table-column">
      <style:table-column-properties fo:break-before="auto" style:column-width="89.29pt"/>
    </style:style>
    <style:style style:name="co10" style:family="table-column">
      <style:table-column-properties fo:break-before="auto" style:column-width="83.54pt"/>
    </style:style>
    <style:style style:name="co11" style:family="table-column">
      <style:table-column-properties fo:break-before="auto" style:column-width="40.79pt"/>
    </style:style>
    <style:style style:name="co12" style:family="table-column">
      <style:table-column-properties fo:break-before="auto" style:column-width="61.26pt"/>
    </style:style>
    <style:style style:name="co13" style:family="table-column">
      <style:table-column-properties fo:break-before="auto" style:column-width="45.89pt"/>
    </style:style>
    <style:style style:name="ro1" style:family="table-row">
      <style:table-row-properties style:row-height="14.26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ta1" style:family="table" style:master-page-name="PageStyle_5f_results_5f_scalability">
      <style:table-properties table:display="true" style:writing-mode="lr-tb"/>
    </style:style>
    <style:style style:name="ta2" style:family="table" style:master-page-name="PageStyle_5f_results_5f_optimization">
      <style:table-properties table:display="true" style:writing-mode="lr-tb"/>
    </style:style>
    <style:style style:name="ta3" style:family="table" style:master-page-name="PageStyle_5f_results_5f_grain_5f_sweep">
      <style:table-properties table:display="true" style:writing-mode="lr-tb"/>
    </style:style>
    <style:style style:name="ta4" style:family="table" style:master-page-name="PageStyle_5f_Sheet1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style:rotation-align="none"/>
      <style:text-properties fo:color="#ffffff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name-complex="Aptos Narrow" style:font-size-complex="11pt" style:font-style-complex="normal" style:font-weight-complex="normal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name-complex="Aptos Narrow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 style:data-style-name="N125">
      <style:table-cell-properties style:rotation-align="non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name-complex="Aptos Narrow" style:font-size-complex="11pt" style:font-style-complex="normal" style:font-weight-complex="normal"/>
    </style:style>
    <style:style style:name="ce5" style:family="table-cell" style:parent-style-name="Default" style:data-style-name="N1">
      <style:table-cell-properties style:rotation-align="non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name-complex="Aptos Narrow" style:font-size-complex="11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name-complex="Aptos Narrow" style:font-size-complex="11pt" style:font-style-complex="normal" style:font-weight-complex="normal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esults_scalability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2" table:default-cell-style-name="Default"/>
        <table:table-column table:style-name="co6" table:number-columns-repeated="998" table:default-cell-style-name="Default"/>
        <table:table-row table:style-name="ro1">
          <table:table-cell table:style-name="ce1" office:value-type="string" calcext:value-type="string">
            <text:p>Threads</text:p>
          </table:table-cell>
          <table:table-cell table:style-name="ce1" office:value-type="string" calcext:value-type="string">
            <text:p>Time(s)</text:p>
          </table:table-cell>
          <table:table-cell table:style-name="ce1" office:value-type="string" calcext:value-type="string">
            <text:p>Energy(J)</text:p>
          </table:table-cell>
          <table:table-cell table:style-name="ce1" office:value-type="string" calcext:value-type="string">
            <text:p>Speedup</text:p>
          </table:table-cell>
          <table:table-cell table:number-columns-repeated="10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38.361" calcext:value-type="float">
            <text:p>38.361</text:p>
          </table:table-cell>
          <table:table-cell table:style-name="ce2" office:value-type="float" office:value="669923" calcext:value-type="float">
            <text:p>669923</text:p>
          </table:table-cell>
          <table:table-cell table:style-name="ce2" table:formula="of:=[.$B$2]/[.B2]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37.8558" calcext:value-type="float">
            <text:p>37.8558</text:p>
          </table:table-cell>
          <table:table-cell table:style-name="ce2" office:value-type="float" office:value="675561" calcext:value-type="float">
            <text:p>675561</text:p>
          </table:table-cell>
          <table:table-cell table:style-name="ce2" table:formula="of:=[.$B$2]/[.B3]" office:value-type="float" office:value="1.01334537904363" calcext:value-type="float">
            <text:p>1.01334537904363</text:p>
          </table:table-cell>
          <table:table-cell table:number-columns-repeated="1020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37.919" calcext:value-type="float">
            <text:p>37.919</text:p>
          </table:table-cell>
          <table:table-cell table:style-name="ce2" office:value-type="float" office:value="670608" calcext:value-type="float">
            <text:p>670608</text:p>
          </table:table-cell>
          <table:table-cell table:style-name="ce2" table:formula="of:=[.$B$2]/[.B4]" office:value-type="float" office:value="1.01165642553865" calcext:value-type="float">
            <text:p>1.01165642553865</text:p>
          </table:table-cell>
          <table:table-cell table:number-columns-repeated="1020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37.7511" calcext:value-type="float">
            <text:p>37.7511</text:p>
          </table:table-cell>
          <table:table-cell table:style-name="ce2" office:value-type="float" office:value="669178" calcext:value-type="float">
            <text:p>669178</text:p>
          </table:table-cell>
          <table:table-cell table:style-name="ce2" table:formula="of:=[.$B$2]/[.B5]" office:value-type="float" office:value="1.01615582062509" calcext:value-type="float">
            <text:p>1.01615582062509</text:p>
          </table:table-cell>
          <table:table-cell table:number-columns-repeated="1020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37.6998" calcext:value-type="float">
            <text:p>37.6998</text:p>
          </table:table-cell>
          <table:table-cell table:style-name="ce2" office:value-type="float" office:value="704992" calcext:value-type="float">
            <text:p>704992</text:p>
          </table:table-cell>
          <table:table-cell table:style-name="ce2" table:formula="of:=[.$B$2]/[.B6]" office:value-type="float" office:value="1.01753855458119" calcext:value-type="float">
            <text:p>1.01753855458119</text:p>
          </table:table-cell>
          <table:table-cell table:number-columns-repeated="1020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float" office:value="37.81003" calcext:value-type="float">
            <text:p>37.81003</text:p>
          </table:table-cell>
          <table:table-cell table:style-name="ce2" office:value-type="float" office:value="673071" calcext:value-type="float">
            <text:p>673071</text:p>
          </table:table-cell>
          <table:table-cell table:style-name="ce2" table:formula="of:=[.$B$2]/[.B7]" office:value-type="float" office:value="1.01457205931865" calcext:value-type="float">
            <text:p>1.01457205931865</text:p>
          </table:table-cell>
          <table:table-cell table:number-columns-repeated="1020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float" office:value="37.694" calcext:value-type="float">
            <text:p>37.694</text:p>
          </table:table-cell>
          <table:table-cell table:style-name="ce2" office:value-type="float" office:value="673229" calcext:value-type="float">
            <text:p>673229</text:p>
          </table:table-cell>
          <table:table-cell table:style-name="ce2" table:formula="of:=[.$B$2]/[.B8]" office:value-type="float" office:value="1.0176951238924" calcext:value-type="float">
            <text:p>1.0176951238924</text:p>
          </table:table-cell>
          <table:table-cell table:number-columns-repeated="3"/>
          <table:table-cell>
            <draw:frame table:end-cell-address="results_scalability.Q24" table:end-x="18.71pt" table:end-y="0.71pt" draw:z-index="0" draw:name="Chart 1" draw:style-name="gr1" draw:text-style-name="P1" svg:width="389.96pt" svg:height="215.97pt" svg:x="24.75pt" svg:y="12.76pt">
              <draw:object draw:notify-on-update-of-ranges="results_scalability.B2:results_scalability.B40 results_scalability.A2:results_scalability.A39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8"/>
          <table:table-cell>
            <draw:frame table:end-cell-address="results_scalability.Y24" table:end-x="34.24pt" table:end-y="1.45pt" draw:z-index="2" draw:name="Chart 3" draw:style-name="gr1" draw:text-style-name="P1" svg:width="386.22pt" svg:height="215.97pt" svg:x="0pt" svg:y="13.49pt">
              <draw:object draw:notify-on-update-of-ranges="results_scalability.C2:results_scalability.C39 results_scalability.A2:results_scalability.A39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1007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37.7004" calcext:value-type="float">
            <text:p>37.7004</text:p>
          </table:table-cell>
          <table:table-cell table:style-name="ce2" office:value-type="float" office:value="671688" calcext:value-type="float">
            <text:p>671688</text:p>
          </table:table-cell>
          <table:table-cell table:style-name="ce2" table:formula="of:=[.$B$2]/[.B9]" office:value-type="float" office:value="1.01752236050546" calcext:value-type="float">
            <text:p>1.01752236050546</text:p>
          </table:table-cell>
          <table:table-cell table:number-columns-repeated="1020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office:value-type="float" office:value="37.7112" calcext:value-type="float">
            <text:p>37.7112</text:p>
          </table:table-cell>
          <table:table-cell table:style-name="ce2" office:value-type="float" office:value="671468" calcext:value-type="float">
            <text:p>671468</text:p>
          </table:table-cell>
          <table:table-cell table:style-name="ce2" table:formula="of:=[.$B$2]/[.B10]" office:value-type="float" office:value="1.01723095525998" calcext:value-type="float">
            <text:p>1.01723095525998</text:p>
          </table:table-cell>
          <table:table-cell table:number-columns-repeated="1020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office:value-type="float" office:value="37.7095" calcext:value-type="float">
            <text:p>37.7095</text:p>
          </table:table-cell>
          <table:table-cell table:style-name="ce2" office:value-type="float" office:value="673950" calcext:value-type="float">
            <text:p>673950</text:p>
          </table:table-cell>
          <table:table-cell table:style-name="ce2" table:formula="of:=[.$B$2]/[.B11]" office:value-type="float" office:value="1.01727681353505" calcext:value-type="float">
            <text:p>1.01727681353505</text:p>
          </table:table-cell>
          <table:table-cell table:number-columns-repeated="1020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 office:value-type="float" office:value="37.7282" calcext:value-type="float">
            <text:p>37.7282</text:p>
          </table:table-cell>
          <table:table-cell table:style-name="ce2" office:value-type="float" office:value="670993" calcext:value-type="float">
            <text:p>670993</text:p>
          </table:table-cell>
          <table:table-cell table:style-name="ce2" table:formula="of:=[.$B$2]/[.B12]" office:value-type="float" office:value="1.01677259980598" calcext:value-type="float">
            <text:p>1.01677259980598</text:p>
          </table:table-cell>
          <table:table-cell table:number-columns-repeated="1020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office:value-type="float" office:value="37.802" calcext:value-type="float">
            <text:p>37.802</text:p>
          </table:table-cell>
          <table:table-cell table:style-name="ce2" office:value-type="float" office:value="671392" calcext:value-type="float">
            <text:p>671392</text:p>
          </table:table-cell>
          <table:table-cell table:style-name="ce2" table:formula="of:=[.$B$2]/[.B13]" office:value-type="float" office:value="1.01478757737686" calcext:value-type="float">
            <text:p>1.01478757737686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37.68" calcext:value-type="float">
            <text:p>37.68</text:p>
          </table:table-cell>
          <table:table-cell table:style-name="ce2" office:value-type="float" office:value="668042" calcext:value-type="float">
            <text:p>668042</text:p>
          </table:table-cell>
          <table:table-cell table:style-name="ce2" table:formula="of:=[.$B$2]/[.B14]" office:value-type="float" office:value="1.01807324840764" calcext:value-type="float">
            <text:p>1.01807324840764</text:p>
          </table:table-cell>
          <table:table-cell table:number-columns-repeated="1020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37.6879" calcext:value-type="float">
            <text:p>37.6879</text:p>
          </table:table-cell>
          <table:table-cell table:style-name="ce2" office:value-type="float" office:value="668754" calcext:value-type="float">
            <text:p>668754</text:p>
          </table:table-cell>
          <table:table-cell table:style-name="ce2" table:formula="of:=[.$B$2]/[.B15]" office:value-type="float" office:value="1.01785984361028" calcext:value-type="float">
            <text:p>1.01785984361028</text:p>
          </table:table-cell>
          <table:table-cell table:number-columns-repeated="1020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office:value-type="float" office:value="37.6572" calcext:value-type="float">
            <text:p>37.6572</text:p>
          </table:table-cell>
          <table:table-cell table:style-name="ce2" office:value-type="float" office:value="701955" calcext:value-type="float">
            <text:p>701955</text:p>
          </table:table-cell>
          <table:table-cell table:style-name="ce2" table:formula="of:=[.$B$2]/[.B16]" office:value-type="float" office:value="1.01868965297473" calcext:value-type="float">
            <text:p>1.01868965297473</text:p>
          </table:table-cell>
          <table:table-cell table:number-columns-repeated="1020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37.6758" calcext:value-type="float">
            <text:p>37.6758</text:p>
          </table:table-cell>
          <table:table-cell table:style-name="ce2" office:value-type="float" office:value="669281" calcext:value-type="float">
            <text:p>669281</text:p>
          </table:table-cell>
          <table:table-cell table:style-name="ce2" table:formula="of:=[.$B$2]/[.B17]" office:value-type="float" office:value="1.01818674056025" calcext:value-type="float">
            <text:p>1.01818674056025</text:p>
          </table:table-cell>
          <table:table-cell table:number-columns-repeated="1020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float" office:value="37.7638" calcext:value-type="float">
            <text:p>37.7638</text:p>
          </table:table-cell>
          <table:table-cell table:style-name="ce2" office:value-type="float" office:value="673959" calcext:value-type="float">
            <text:p>673959</text:p>
          </table:table-cell>
          <table:table-cell table:style-name="ce2" table:formula="of:=[.$B$2]/[.B18]" office:value-type="float" office:value="1.01581408650612" calcext:value-type="float">
            <text:p>1.01581408650612</text:p>
          </table:table-cell>
          <table:table-cell table:number-columns-repeated="1020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2" office:value-type="float" office:value="37.8032" calcext:value-type="float">
            <text:p>37.8032</text:p>
          </table:table-cell>
          <table:table-cell table:style-name="ce2" office:value-type="float" office:value="670527" calcext:value-type="float">
            <text:p>670527</text:p>
          </table:table-cell>
          <table:table-cell table:style-name="ce2" table:formula="of:=[.$B$2]/[.B19]" office:value-type="float" office:value="1.01475536462522" calcext:value-type="float">
            <text:p>1.01475536462522</text:p>
          </table:table-cell>
          <table:table-cell table:number-columns-repeated="1020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office:value-type="float" office:value="37.7162" calcext:value-type="float">
            <text:p>37.7162</text:p>
          </table:table-cell>
          <table:table-cell table:style-name="ce2" office:value-type="float" office:value="671985" calcext:value-type="float">
            <text:p>671985</text:p>
          </table:table-cell>
          <table:table-cell table:style-name="ce2" table:formula="of:=[.$B$2]/[.B20]" office:value-type="float" office:value="1.01709610194028" calcext:value-type="float">
            <text:p>1.01709610194028</text:p>
          </table:table-cell>
          <table:table-cell table:number-columns-repeated="1020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office:value-type="float" office:value="37.7923" calcext:value-type="float">
            <text:p>37.7923</text:p>
          </table:table-cell>
          <table:table-cell table:style-name="ce2" office:value-type="float" office:value="668874" calcext:value-type="float">
            <text:p>668874</text:p>
          </table:table-cell>
          <table:table-cell table:style-name="ce2" table:formula="of:=[.$B$2]/[.B21]" office:value-type="float" office:value="1.01504803888623" calcext:value-type="float">
            <text:p>1.01504803888623</text:p>
          </table:table-cell>
          <table:table-cell table:number-columns-repeated="1020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office:value-type="float" office:value="37.768" calcext:value-type="float">
            <text:p>37.768</text:p>
          </table:table-cell>
          <table:table-cell table:style-name="ce2" office:value-type="float" office:value="672327" calcext:value-type="float">
            <text:p>672327</text:p>
          </table:table-cell>
          <table:table-cell table:style-name="ce2" table:formula="of:=[.$B$2]/[.B22]" office:value-type="float" office:value="1.01570112264351" calcext:value-type="float">
            <text:p>1.01570112264351</text:p>
          </table:table-cell>
          <table:table-cell table:number-columns-repeated="1020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2" office:value-type="float" office:value="37.7871" calcext:value-type="float">
            <text:p>37.7871</text:p>
          </table:table-cell>
          <table:table-cell table:style-name="ce2" office:value-type="float" office:value="674200" calcext:value-type="float">
            <text:p>674200</text:p>
          </table:table-cell>
          <table:table-cell table:style-name="ce2" table:formula="of:=[.$B$2]/[.B23]" office:value-type="float" office:value="1.01518772279429" calcext:value-type="float">
            <text:p>1.01518772279429</text:p>
          </table:table-cell>
          <table:table-cell table:number-columns-repeated="1020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2" office:value-type="float" office:value="37.7164" calcext:value-type="float">
            <text:p>37.7164</text:p>
          </table:table-cell>
          <table:table-cell table:style-name="ce2" office:value-type="float" office:value="670235" calcext:value-type="float">
            <text:p>670235</text:p>
          </table:table-cell>
          <table:table-cell table:style-name="ce2" table:formula="of:=[.$B$2]/[.B24]" office:value-type="float" office:value="1.01709070855119" calcext:value-type="float">
            <text:p>1.01709070855119</text:p>
          </table:table-cell>
          <table:table-cell table:number-columns-repeated="1020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2" office:value-type="float" office:value="37.7274" calcext:value-type="float">
            <text:p>37.7274</text:p>
          </table:table-cell>
          <table:table-cell table:style-name="ce2" office:value-type="float" office:value="705989" calcext:value-type="float">
            <text:p>705989</text:p>
          </table:table-cell>
          <table:table-cell table:style-name="ce2" table:formula="of:=[.$B$2]/[.B25]" office:value-type="float" office:value="1.01679416021247" calcext:value-type="float">
            <text:p>1.01679416021247</text:p>
          </table:table-cell>
          <table:table-cell table:number-columns-repeated="3"/>
          <table:table-cell>
            <draw:frame table:end-cell-address="results_scalability.Q40" table:end-x="13.46pt" table:end-y="1.5pt" draw:z-index="1" draw:name="Chart 2" draw:style-name="gr1" draw:text-style-name="P1" svg:width="386.22pt" svg:height="215.23pt" svg:x="23.24pt" svg:y="0pt">
              <draw:object draw:notify-on-update-of-ranges="results_scalability.D2:results_scalability.D39 results_scalability.A2:results_scalability.A39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016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2" office:value-type="float" office:value="37.6814" calcext:value-type="float">
            <text:p>37.6814</text:p>
          </table:table-cell>
          <table:table-cell table:style-name="ce2" office:value-type="float" office:value="686262" calcext:value-type="float">
            <text:p>686262</text:p>
          </table:table-cell>
          <table:table-cell table:style-name="ce2" table:formula="of:=[.$B$2]/[.B26]" office:value-type="float" office:value="1.0180354233123" calcext:value-type="float">
            <text:p>1.0180354233123</text:p>
          </table:table-cell>
          <table:table-cell table:number-columns-repeated="1020"/>
        </table:table-row>
        <table:table-row table:style-name="ro1">
          <table:table-cell table:style-name="ce2" office:value-type="float" office:value="76" calcext:value-type="float">
            <text:p>76</text:p>
          </table:table-cell>
          <table:table-cell table:style-name="ce2" office:value-type="float" office:value="37.7359" calcext:value-type="float">
            <text:p>37.7359</text:p>
          </table:table-cell>
          <table:table-cell table:style-name="ce2" office:value-type="float" office:value="674995" calcext:value-type="float">
            <text:p>674995</text:p>
          </table:table-cell>
          <table:table-cell table:style-name="ce2" table:formula="of:=[.$B$2]/[.B27]" office:value-type="float" office:value="1.01656512763708" calcext:value-type="float">
            <text:p>1.01656512763708</text:p>
          </table:table-cell>
          <table:table-cell table:number-columns-repeated="1020"/>
        </table:table-row>
        <table:table-row table:style-name="ro1">
          <table:table-cell table:style-name="ce2" office:value-type="float" office:value="80" calcext:value-type="float">
            <text:p>80</text:p>
          </table:table-cell>
          <table:table-cell table:style-name="ce2" office:value-type="float" office:value="37.942" calcext:value-type="float">
            <text:p>37.942</text:p>
          </table:table-cell>
          <table:table-cell table:style-name="ce2" office:value-type="float" office:value="671753" calcext:value-type="float">
            <text:p>671753</text:p>
          </table:table-cell>
          <table:table-cell table:style-name="ce2" table:formula="of:=[.$B$2]/[.B28]" office:value-type="float" office:value="1.01104317115597" calcext:value-type="float">
            <text:p>1.01104317115597</text:p>
          </table:table-cell>
          <table:table-cell table:number-columns-repeated="1020"/>
        </table:table-row>
        <table:table-row table:style-name="ro1">
          <table:table-cell table:style-name="ce2" office:value-type="float" office:value="84" calcext:value-type="float">
            <text:p>84</text:p>
          </table:table-cell>
          <table:table-cell table:style-name="ce2" office:value-type="float" office:value="37.717" calcext:value-type="float">
            <text:p>37.717</text:p>
          </table:table-cell>
          <table:table-cell table:style-name="ce2" office:value-type="float" office:value="677978" calcext:value-type="float">
            <text:p>677978</text:p>
          </table:table-cell>
          <table:table-cell table:style-name="ce2" table:formula="of:=[.$B$2]/[.B29]" office:value-type="float" office:value="1.0170745287271" calcext:value-type="float">
            <text:p>1.0170745287271</text:p>
          </table:table-cell>
          <table:table-cell table:number-columns-repeated="1020"/>
        </table:table-row>
        <table:table-row table:style-name="ro1">
          <table:table-cell table:style-name="ce2" office:value-type="float" office:value="88" calcext:value-type="float">
            <text:p>88</text:p>
          </table:table-cell>
          <table:table-cell table:style-name="ce2" office:value-type="float" office:value="37.7166" calcext:value-type="float">
            <text:p>37.7166</text:p>
          </table:table-cell>
          <table:table-cell table:style-name="ce2" office:value-type="float" office:value="709134" calcext:value-type="float">
            <text:p>709134</text:p>
          </table:table-cell>
          <table:table-cell table:style-name="ce2" table:formula="of:=[.$B$2]/[.B30]" office:value-type="float" office:value="1.01708531521929" calcext:value-type="float">
            <text:p>1.01708531521929</text:p>
          </table:table-cell>
          <table:table-cell table:number-columns-repeated="1020"/>
        </table:table-row>
        <table:table-row table:style-name="ro1">
          <table:table-cell table:style-name="ce2" office:value-type="float" office:value="92" calcext:value-type="float">
            <text:p>92</text:p>
          </table:table-cell>
          <table:table-cell table:style-name="ce2" office:value-type="float" office:value="37.6976" calcext:value-type="float">
            <text:p>37.6976</text:p>
          </table:table-cell>
          <table:table-cell table:style-name="ce2" office:value-type="float" office:value="701895" calcext:value-type="float">
            <text:p>701895</text:p>
          </table:table-cell>
          <table:table-cell table:style-name="ce2" table:formula="of:=[.$B$2]/[.B31]" office:value-type="float" office:value="1.01759793726922" calcext:value-type="float">
            <text:p>1.01759793726922</text:p>
          </table:table-cell>
          <table:table-cell table:number-columns-repeated="1020"/>
        </table:table-row>
        <table:table-row table:style-name="ro1">
          <table:table-cell table:style-name="ce2" office:value-type="float" office:value="96" calcext:value-type="float">
            <text:p>96</text:p>
          </table:table-cell>
          <table:table-cell table:style-name="ce2" office:value-type="float" office:value="37.6847" calcext:value-type="float">
            <text:p>37.6847</text:p>
          </table:table-cell>
          <table:table-cell table:style-name="ce2" office:value-type="float" office:value="698100" calcext:value-type="float">
            <text:p>698100</text:p>
          </table:table-cell>
          <table:table-cell table:style-name="ce2" table:formula="of:=[.$B$2]/[.B32]" office:value-type="float" office:value="1.01794627527883" calcext:value-type="float">
            <text:p>1.01794627527883</text:p>
          </table:table-cell>
          <table:table-cell table:number-columns-repeated="1020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37.665" calcext:value-type="float">
            <text:p>37.665</text:p>
          </table:table-cell>
          <table:table-cell table:style-name="ce2" office:value-type="float" office:value="686703" calcext:value-type="float">
            <text:p>686703</text:p>
          </table:table-cell>
          <table:table-cell table:style-name="ce2" table:formula="of:=[.$B$2]/[.B33]" office:value-type="float" office:value="1.01847869374751" calcext:value-type="float">
            <text:p>1.01847869374751</text:p>
          </table:table-cell>
          <table:table-cell table:number-columns-repeated="1020"/>
        </table:table-row>
        <table:table-row table:style-name="ro1">
          <table:table-cell table:style-name="ce2" office:value-type="float" office:value="104" calcext:value-type="float">
            <text:p>104</text:p>
          </table:table-cell>
          <table:table-cell table:style-name="ce2" office:value-type="float" office:value="37.889" calcext:value-type="float">
            <text:p>37.889</text:p>
          </table:table-cell>
          <table:table-cell table:style-name="ce2" office:value-type="float" office:value="707630" calcext:value-type="float">
            <text:p>707630</text:p>
          </table:table-cell>
          <table:table-cell table:style-name="ce2" table:formula="of:=[.$B$2]/[.B34]" office:value-type="float" office:value="1.01245744147378" calcext:value-type="float">
            <text:p>1.01245744147378</text:p>
          </table:table-cell>
          <table:table-cell table:number-columns-repeated="1020"/>
        </table:table-row>
        <table:table-row table:style-name="ro1">
          <table:table-cell table:style-name="ce2" office:value-type="float" office:value="108" calcext:value-type="float">
            <text:p>108</text:p>
          </table:table-cell>
          <table:table-cell table:style-name="ce2" office:value-type="float" office:value="37.7028" calcext:value-type="float">
            <text:p>37.7028</text:p>
          </table:table-cell>
          <table:table-cell table:style-name="ce2" office:value-type="float" office:value="692573" calcext:value-type="float">
            <text:p>692573</text:p>
          </table:table-cell>
          <table:table-cell table:style-name="ce2" table:formula="of:=[.$B$2]/[.B35]" office:value-type="float" office:value="1.01745758935676" calcext:value-type="float">
            <text:p>1.01745758935676</text:p>
          </table:table-cell>
          <table:table-cell table:number-columns-repeated="1020"/>
        </table:table-row>
        <table:table-row table:style-name="ro1">
          <table:table-cell table:style-name="ce2" office:value-type="float" office:value="112" calcext:value-type="float">
            <text:p>112</text:p>
          </table:table-cell>
          <table:table-cell table:style-name="ce2" office:value-type="float" office:value="37.7048" calcext:value-type="float">
            <text:p>37.7048</text:p>
          </table:table-cell>
          <table:table-cell table:style-name="ce2" office:value-type="float" office:value="706075" calcext:value-type="float">
            <text:p>706075</text:p>
          </table:table-cell>
          <table:table-cell table:style-name="ce2" table:formula="of:=[.$B$2]/[.B36]" office:value-type="float" office:value="1.01740361969829" calcext:value-type="float">
            <text:p>1.01740361969829</text:p>
          </table:table-cell>
          <table:table-cell table:number-columns-repeated="1020"/>
        </table:table-row>
        <table:table-row table:style-name="ro1">
          <table:table-cell table:style-name="ce2" office:value-type="float" office:value="116" calcext:value-type="float">
            <text:p>116</text:p>
          </table:table-cell>
          <table:table-cell table:style-name="ce2" office:value-type="float" office:value="38.027" calcext:value-type="float">
            <text:p>38.027</text:p>
          </table:table-cell>
          <table:table-cell table:style-name="ce2" office:value-type="float" office:value="699506" calcext:value-type="float">
            <text:p>699506</text:p>
          </table:table-cell>
          <table:table-cell table:style-name="ce2" table:formula="of:=[.$B$2]/[.B37]" office:value-type="float" office:value="1.00878323296605" calcext:value-type="float">
            <text:p>1.00878323296605</text:p>
          </table:table-cell>
          <table:table-cell table:number-columns-repeated="1020"/>
        </table:table-row>
        <table:table-row table:style-name="ro1"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37.7364" calcext:value-type="float">
            <text:p>37.7364</text:p>
          </table:table-cell>
          <table:table-cell table:style-name="ce2" office:value-type="float" office:value="699576" calcext:value-type="float">
            <text:p>699576</text:p>
          </table:table-cell>
          <table:table-cell table:style-name="ce2" table:formula="of:=[.$B$2]/[.B38]" office:value-type="float" office:value="1.01655165834579" calcext:value-type="float">
            <text:p>1.01655165834579</text:p>
          </table:table-cell>
          <table:table-cell table:number-columns-repeated="1020"/>
        </table:table-row>
        <table:table-row table:style-name="ro1">
          <table:table-cell table:style-name="ce2" office:value-type="float" office:value="124" calcext:value-type="float">
            <text:p>124</text:p>
          </table:table-cell>
          <table:table-cell table:style-name="ce2" office:value-type="float" office:value="37.733" calcext:value-type="float">
            <text:p>37.733</text:p>
          </table:table-cell>
          <table:table-cell table:style-name="ce2" office:value-type="float" office:value="687714" calcext:value-type="float">
            <text:p>687714</text:p>
          </table:table-cell>
          <table:table-cell table:style-name="ce2" table:formula="of:=[.$B$2]/[.B39]" office:value-type="float" office:value="1.01664325656587" calcext:value-type="float">
            <text:p>1.01664325656587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2" table:formula="of:=MIN([.B2:.B39])" office:value-type="float" office:value="37.6572" calcext:value-type="float">
            <text:p>37.6572</text:p>
          </table:table-cell>
          <table:table-cell table:style-name="ce2" table:number-columns-repeated="2"/>
          <table:table-cell table:number-columns-repeated="1020"/>
        </table:table-row>
        <table:table-row table:style-name="ro1" table:number-rows-repeated="960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ExternalData_1" table:base-cell-address="$results_scalability.$A$1" table:cell-range-address="$results_scalability.$A$1:.$C$39"/>
        </table:named-expressions>
      </table:table>
      <table:table table:name="results_optimization" table:style-name="ta2"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column table:style-name="co8" table:default-cell-style-name="Default"/>
        <table:table-column table:style-name="co5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5" table:number-columns-repeated="15" table:default-cell-style-name="Default"/>
        <table:table-column table:style-name="co6" table:number-columns-repeated="998" table:default-cell-style-name="Default"/>
        <table:table-row table:style-name="ro1">
          <table:table-cell table:style-name="ce1" office:value-type="string" calcext:value-type="string">
            <text:p>Partitioner</text:p>
          </table:table-cell>
          <table:table-cell table:style-name="ce1" office:value-type="string" calcext:value-type="string">
            <text:p>GrainSize</text:p>
          </table:table-cell>
          <table:table-cell table:style-name="ce1" office:value-type="string" calcext:value-type="string">
            <text:p>Time(s)</text:p>
          </table:table-cell>
          <table:table-cell table:style-name="ce1" office:value-type="string" calcext:value-type="string">
            <text:p>Energy(J)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uto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float" office:value="37.92" calcext:value-type="float">
            <text:p>37.920</text:p>
          </table:table-cell>
          <table:table-cell table:style-name="ce5" office:value-type="float" office:value="720518" calcext:value-type="float">
            <text:p>720518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uto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37.862" calcext:value-type="float">
            <text:p>37.862</text:p>
          </table:table-cell>
          <table:table-cell table:style-name="ce5" office:value-type="float" office:value="695748" calcext:value-type="float">
            <text:p>695748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uto</text:p>
          </table:table-cell>
          <table:table-cell table:style-name="ce2" office:value-type="float" office:value="32" calcext:value-type="float">
            <text:p>32</text:p>
          </table:table-cell>
          <table:table-cell table:style-name="ce4" office:value-type="float" office:value="37.846" calcext:value-type="float">
            <text:p>37.846</text:p>
          </table:table-cell>
          <table:table-cell table:style-name="ce5" office:value-type="float" office:value="707164" calcext:value-type="float">
            <text:p>707164</text:p>
          </table:table-cell>
          <table:table-cell table:number-columns-repeated="13"/>
          <table:table-cell>
            <draw:frame table:end-cell-address="results_optimization.AA19" table:end-x="23.22pt" table:end-y="2.24pt" draw:z-index="1" draw:name="Chart 5" draw:style-name="gr1" draw:text-style-name="P1" svg:width="389.96pt" svg:height="215.23pt" svg:x="29.25pt" svg:y="0.74pt">
              <draw:object draw:notify-on-update-of-ranges="results_optimization.D2:results_optimization.D40 results_optimization.C2:results_optimization.C40"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auto</text:p>
          </table:table-cell>
          <table:table-cell table:style-name="ce2" office:value-type="float" office:value="64" calcext:value-type="float">
            <text:p>64</text:p>
          </table:table-cell>
          <table:table-cell table:style-name="ce4" office:value-type="float" office:value="38.118" calcext:value-type="float">
            <text:p>38.118</text:p>
          </table:table-cell>
          <table:table-cell table:style-name="ce5" office:value-type="float" office:value="701812" calcext:value-type="float">
            <text:p>701812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uto</text:p>
          </table:table-cell>
          <table:table-cell table:style-name="ce2" office:value-type="float" office:value="128" calcext:value-type="float">
            <text:p>128</text:p>
          </table:table-cell>
          <table:table-cell table:style-name="ce4" office:value-type="float" office:value="38.492" calcext:value-type="float">
            <text:p>38.492</text:p>
          </table:table-cell>
          <table:table-cell table:style-name="ce5" office:value-type="float" office:value="723603" calcext:value-type="float">
            <text:p>72360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uto</text:p>
          </table:table-cell>
          <table:table-cell table:style-name="ce2" office:value-type="float" office:value="256" calcext:value-type="float">
            <text:p>256</text:p>
          </table:table-cell>
          <table:table-cell table:style-name="ce4" office:value-type="float" office:value="38.445" calcext:value-type="float">
            <text:p>38.445</text:p>
          </table:table-cell>
          <table:table-cell table:style-name="ce5" office:value-type="float" office:value="704042" calcext:value-type="float">
            <text:p>704042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uto</text:p>
          </table:table-cell>
          <table:table-cell table:style-name="ce2" office:value-type="float" office:value="512" calcext:value-type="float">
            <text:p>512</text:p>
          </table:table-cell>
          <table:table-cell table:style-name="ce4" office:value-type="float" office:value="38.288" calcext:value-type="float">
            <text:p>38.288</text:p>
          </table:table-cell>
          <table:table-cell table:style-name="ce5" office:value-type="float" office:value="683849" calcext:value-type="float">
            <text:p>683849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uto</text:p>
          </table:table-cell>
          <table:table-cell table:style-name="ce2" office:value-type="float" office:value="1024" calcext:value-type="float">
            <text:p>1024</text:p>
          </table:table-cell>
          <table:table-cell table:style-name="ce4" office:value-type="float" office:value="37.912" calcext:value-type="float">
            <text:p>37.912</text:p>
          </table:table-cell>
          <table:table-cell table:style-name="ce5" office:value-type="float" office:value="700867" calcext:value-type="float">
            <text:p>70086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uto</text:p>
          </table:table-cell>
          <table:table-cell table:style-name="ce2" office:value-type="float" office:value="2048" calcext:value-type="float">
            <text:p>2048</text:p>
          </table:table-cell>
          <table:table-cell table:style-name="ce4" office:value-type="float" office:value="37.858" calcext:value-type="float">
            <text:p>37.858</text:p>
          </table:table-cell>
          <table:table-cell table:style-name="ce5" office:value-type="float" office:value="704901" calcext:value-type="float">
            <text:p>70490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uto</text:p>
          </table:table-cell>
          <table:table-cell table:style-name="ce3" office:value-type="float" office:value="4096" calcext:value-type="float">
            <text:p>4096</text:p>
          </table:table-cell>
          <table:table-cell table:style-name="ce4" office:value-type="float" office:value="38.282" calcext:value-type="float">
            <text:p>38.282</text:p>
          </table:table-cell>
          <table:table-cell table:style-name="ce5" office:value-type="float" office:value="708583" calcext:value-type="float">
            <text:p>70858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imple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37.7303" calcext:value-type="float">
            <text:p>37.730</text:p>
          </table:table-cell>
          <table:table-cell table:style-name="ce5" office:value-type="float" office:value="706636" calcext:value-type="float">
            <text:p>706636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imple</text:p>
          </table:table-cell>
          <table:table-cell table:style-name="ce2" office:value-type="float" office:value="32" calcext:value-type="float">
            <text:p>32</text:p>
          </table:table-cell>
          <table:table-cell table:style-name="ce4" office:value-type="float" office:value="37.7107" calcext:value-type="float">
            <text:p>37.711</text:p>
          </table:table-cell>
          <table:table-cell table:style-name="ce5" office:value-type="float" office:value="706283" calcext:value-type="float">
            <text:p>70628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imple</text:p>
          </table:table-cell>
          <table:table-cell table:style-name="ce2" office:value-type="float" office:value="64" calcext:value-type="float">
            <text:p>64</text:p>
          </table:table-cell>
          <table:table-cell table:style-name="ce4" office:value-type="float" office:value="37.6744" calcext:value-type="float">
            <text:p>37.674</text:p>
          </table:table-cell>
          <table:table-cell table:style-name="ce5" office:value-type="float" office:value="706260" calcext:value-type="float">
            <text:p>70626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imple</text:p>
          </table:table-cell>
          <table:table-cell table:style-name="ce2" office:value-type="float" office:value="128" calcext:value-type="float">
            <text:p>128</text:p>
          </table:table-cell>
          <table:table-cell table:style-name="ce4" office:value-type="float" office:value="37.725" calcext:value-type="float">
            <text:p>37.725</text:p>
          </table:table-cell>
          <table:table-cell table:style-name="ce5" office:value-type="float" office:value="708809" calcext:value-type="float">
            <text:p>708809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imple</text:p>
          </table:table-cell>
          <table:table-cell table:style-name="ce2" office:value-type="float" office:value="256" calcext:value-type="float">
            <text:p>256</text:p>
          </table:table-cell>
          <table:table-cell table:style-name="ce4" office:value-type="float" office:value="37.719" calcext:value-type="float">
            <text:p>37.719</text:p>
          </table:table-cell>
          <table:table-cell table:style-name="ce5" office:value-type="float" office:value="707078" calcext:value-type="float">
            <text:p>707078</text:p>
          </table:table-cell>
          <table:table-cell/>
          <table:table-cell table:style-name="ce2" office:value-type="string" calcext:value-type="string">
            <text:p>Average of Time(s)</text:p>
          </table:table-cell>
          <table:table-cell table:style-name="ce2" office:value-type="string" calcext:value-type="string">
            <text:p>Column Label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imple</text:p>
          </table:table-cell>
          <table:table-cell table:style-name="ce2" office:value-type="float" office:value="512" calcext:value-type="float">
            <text:p>512</text:p>
          </table:table-cell>
          <table:table-cell table:style-name="ce4" office:value-type="float" office:value="37.6836" calcext:value-type="float">
            <text:p>37.684</text:p>
          </table:table-cell>
          <table:table-cell table:style-name="ce5" office:value-type="float" office:value="709984" calcext:value-type="float">
            <text:p>709984</text:p>
          </table:table-cell>
          <table:table-cell/>
          <table:table-cell table:style-name="ce2" office:value-type="string" calcext:value-type="string">
            <text:p>Row Labels</text:p>
          </table:table-cell>
          <table:table-cell table:style-name="ce2" office:value-type="string" calcext:value-type="string">
            <text:p>affinity</text:p>
          </table:table-cell>
          <table:table-cell table:style-name="ce2" office:value-type="string" calcext:value-type="string">
            <text:p>auto</text:p>
          </table:table-cell>
          <table:table-cell table:style-name="ce2" office:value-type="string" calcext:value-type="string">
            <text:p>simple</text:p>
          </table:table-cell>
          <table:table-cell table:style-name="ce2" office:value-type="string" calcext:value-type="string">
            <text:p>static</text:p>
          </table:table-cell>
          <table:table-cell table:style-name="ce2" office:value-type="string" calcext:value-type="string">
            <text:p>Grand To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simple</text:p>
          </table:table-cell>
          <table:table-cell table:style-name="ce2" office:value-type="float" office:value="1024" calcext:value-type="float">
            <text:p>1024</text:p>
          </table:table-cell>
          <table:table-cell table:style-name="ce4" office:value-type="float" office:value="37.7818" calcext:value-type="float">
            <text:p>37.782</text:p>
          </table:table-cell>
          <table:table-cell table:style-name="ce5" office:value-type="float" office:value="704967" calcext:value-type="float">
            <text:p>704967</text:p>
          </table:table-cell>
          <table:table-cell/>
          <table:table-cell table:style-name="ce6" office:value-type="float" office:value="0" calcext:value-type="float">
            <text:p>0</text:p>
          </table:table-cell>
          <table:table-cell table:style-name="ce2" office:value-type="float" office:value="37.911" calcext:value-type="float">
            <text:p>37.911</text:p>
          </table:table-cell>
          <table:table-cell table:style-name="ce2" office:value-type="float" office:value="37.92" calcext:value-type="float">
            <text:p>37.92</text:p>
          </table:table-cell>
          <table:table-cell table:style-name="ce2"/>
          <table:table-cell table:style-name="ce2" office:value-type="float" office:value="37.6929" calcext:value-type="float">
            <text:p>37.6929</text:p>
          </table:table-cell>
          <table:table-cell table:style-name="ce2" office:value-type="float" office:value="37.8413" calcext:value-type="float">
            <text:p>37.8413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simple</text:p>
          </table:table-cell>
          <table:table-cell table:style-name="ce2" office:value-type="float" office:value="2048" calcext:value-type="float">
            <text:p>2048</text:p>
          </table:table-cell>
          <table:table-cell table:style-name="ce4" office:value-type="float" office:value="37.7567" calcext:value-type="float">
            <text:p>37.757</text:p>
          </table:table-cell>
          <table:table-cell table:style-name="ce5" office:value-type="float" office:value="700203" calcext:value-type="float">
            <text:p>700203</text:p>
          </table:table-cell>
          <table:table-cell/>
          <table:table-cell table:style-name="ce6" office:value-type="float" office:value="1" calcext:value-type="float">
            <text:p>1</text:p>
          </table:table-cell>
          <table:table-cell table:style-name="ce2" office:value-type="float" office:value="37.7252" calcext:value-type="float">
            <text:p>37.7252</text:p>
          </table:table-cell>
          <table:table-cell table:style-name="ce2" office:value-type="float" office:value="37.862" calcext:value-type="float">
            <text:p>37.862</text:p>
          </table:table-cell>
          <table:table-cell table:style-name="ce2" office:value-type="float" office:value="37.7303" calcext:value-type="float">
            <text:p>37.7303</text:p>
          </table:table-cell>
          <table:table-cell table:style-name="ce2" office:value-type="float" office:value="37.7306" calcext:value-type="float">
            <text:p>37.7306</text:p>
          </table:table-cell>
          <table:table-cell table:style-name="ce2" office:value-type="float" office:value="37.762025" calcext:value-type="float">
            <text:p>37.762025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simple</text:p>
          </table:table-cell>
          <table:table-cell table:style-name="ce2" office:value-type="float" office:value="4096" calcext:value-type="float">
            <text:p>4096</text:p>
          </table:table-cell>
          <table:table-cell table:style-name="ce4" office:value-type="float" office:value="37.7148" calcext:value-type="float">
            <text:p>37.715</text:p>
          </table:table-cell>
          <table:table-cell table:style-name="ce5" office:value-type="float" office:value="704693" calcext:value-type="float">
            <text:p>704693</text:p>
          </table:table-cell>
          <table:table-cell/>
          <table:table-cell table:style-name="ce6" office:value-type="float" office:value="32" calcext:value-type="float">
            <text:p>32</text:p>
          </table:table-cell>
          <table:table-cell table:style-name="ce2" office:value-type="float" office:value="37.7405" calcext:value-type="float">
            <text:p>37.7405</text:p>
          </table:table-cell>
          <table:table-cell table:style-name="ce2" office:value-type="float" office:value="37.846" calcext:value-type="float">
            <text:p>37.846</text:p>
          </table:table-cell>
          <table:table-cell table:style-name="ce2" office:value-type="float" office:value="37.7107" calcext:value-type="float">
            <text:p>37.7107</text:p>
          </table:table-cell>
          <table:table-cell table:style-name="ce2" office:value-type="float" office:value="37.7542" calcext:value-type="float">
            <text:p>37.7542</text:p>
          </table:table-cell>
          <table:table-cell table:style-name="ce2" office:value-type="float" office:value="37.76285" calcext:value-type="float">
            <text:p>37.76285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static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float" office:value="37.6929" calcext:value-type="float">
            <text:p>37.693</text:p>
          </table:table-cell>
          <table:table-cell table:style-name="ce5" office:value-type="float" office:value="695874" calcext:value-type="float">
            <text:p>695874</text:p>
          </table:table-cell>
          <table:table-cell/>
          <table:table-cell table:style-name="ce6" office:value-type="float" office:value="64" calcext:value-type="float">
            <text:p>64</text:p>
          </table:table-cell>
          <table:table-cell table:style-name="ce2" office:value-type="float" office:value="37.6909" calcext:value-type="float">
            <text:p>37.6909</text:p>
          </table:table-cell>
          <table:table-cell table:style-name="ce2" office:value-type="float" office:value="38.118" calcext:value-type="float">
            <text:p>38.118</text:p>
          </table:table-cell>
          <table:table-cell table:style-name="ce2" office:value-type="float" office:value="37.6744" calcext:value-type="float">
            <text:p>37.6744</text:p>
          </table:table-cell>
          <table:table-cell table:style-name="ce2" office:value-type="float" office:value="37.8251" calcext:value-type="float">
            <text:p>37.8251</text:p>
          </table:table-cell>
          <table:table-cell table:style-name="ce2" office:value-type="float" office:value="37.8271" calcext:value-type="float">
            <text:p>37.8271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static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37.7306" calcext:value-type="float">
            <text:p>37.731</text:p>
          </table:table-cell>
          <table:table-cell table:style-name="ce5" office:value-type="float" office:value="706516" calcext:value-type="float">
            <text:p>706516</text:p>
          </table:table-cell>
          <table:table-cell/>
          <table:table-cell table:style-name="ce6" office:value-type="float" office:value="128" calcext:value-type="float">
            <text:p>128</text:p>
          </table:table-cell>
          <table:table-cell table:style-name="ce2" office:value-type="float" office:value="37.8039" calcext:value-type="float">
            <text:p>37.8039</text:p>
          </table:table-cell>
          <table:table-cell table:style-name="ce2" office:value-type="float" office:value="38.492" calcext:value-type="float">
            <text:p>38.492</text:p>
          </table:table-cell>
          <table:table-cell table:style-name="ce2" office:value-type="float" office:value="37.725" calcext:value-type="float">
            <text:p>37.725</text:p>
          </table:table-cell>
          <table:table-cell table:style-name="ce2" office:value-type="float" office:value="37.7922" calcext:value-type="float">
            <text:p>37.7922</text:p>
          </table:table-cell>
          <table:table-cell table:style-name="ce2" office:value-type="float" office:value="37.953275" calcext:value-type="float">
            <text:p>37.953275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static</text:p>
          </table:table-cell>
          <table:table-cell table:style-name="ce2" office:value-type="float" office:value="32" calcext:value-type="float">
            <text:p>32</text:p>
          </table:table-cell>
          <table:table-cell table:style-name="ce4" office:value-type="float" office:value="37.7542" calcext:value-type="float">
            <text:p>37.754</text:p>
          </table:table-cell>
          <table:table-cell table:style-name="ce5" office:value-type="float" office:value="708832" calcext:value-type="float">
            <text:p>708832</text:p>
          </table:table-cell>
          <table:table-cell/>
          <table:table-cell table:style-name="ce6" office:value-type="float" office:value="256" calcext:value-type="float">
            <text:p>256</text:p>
          </table:table-cell>
          <table:table-cell table:style-name="ce2" office:value-type="float" office:value="37.7578" calcext:value-type="float">
            <text:p>37.7578</text:p>
          </table:table-cell>
          <table:table-cell table:style-name="ce2" office:value-type="float" office:value="38.445" calcext:value-type="float">
            <text:p>38.445</text:p>
          </table:table-cell>
          <table:table-cell table:style-name="ce2" office:value-type="float" office:value="37.719" calcext:value-type="float">
            <text:p>37.719</text:p>
          </table:table-cell>
          <table:table-cell table:style-name="ce2" office:value-type="float" office:value="37.6816" calcext:value-type="float">
            <text:p>37.6816</text:p>
          </table:table-cell>
          <table:table-cell table:style-name="ce2" office:value-type="float" office:value="37.90085" calcext:value-type="float">
            <text:p>37.90085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static</text:p>
          </table:table-cell>
          <table:table-cell table:style-name="ce2" office:value-type="float" office:value="64" calcext:value-type="float">
            <text:p>64</text:p>
          </table:table-cell>
          <table:table-cell table:style-name="ce4" office:value-type="float" office:value="37.8251" calcext:value-type="float">
            <text:p>37.825</text:p>
          </table:table-cell>
          <table:table-cell table:style-name="ce5" office:value-type="float" office:value="710808" calcext:value-type="float">
            <text:p>710808</text:p>
          </table:table-cell>
          <table:table-cell/>
          <table:table-cell table:style-name="ce6" office:value-type="float" office:value="512" calcext:value-type="float">
            <text:p>512</text:p>
          </table:table-cell>
          <table:table-cell table:style-name="ce2" office:value-type="float" office:value="37.7389" calcext:value-type="float">
            <text:p>37.7389</text:p>
          </table:table-cell>
          <table:table-cell table:style-name="ce2" office:value-type="float" office:value="38.288" calcext:value-type="float">
            <text:p>38.288</text:p>
          </table:table-cell>
          <table:table-cell table:style-name="ce2" office:value-type="float" office:value="37.6836" calcext:value-type="float">
            <text:p>37.6836</text:p>
          </table:table-cell>
          <table:table-cell table:style-name="ce2" office:value-type="float" office:value="37.7746" calcext:value-type="float">
            <text:p>37.7746</text:p>
          </table:table-cell>
          <table:table-cell table:style-name="ce2" office:value-type="float" office:value="37.871275" calcext:value-type="float">
            <text:p>37.871275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static</text:p>
          </table:table-cell>
          <table:table-cell table:style-name="ce2" office:value-type="float" office:value="128" calcext:value-type="float">
            <text:p>128</text:p>
          </table:table-cell>
          <table:table-cell table:style-name="ce4" office:value-type="float" office:value="37.7922" calcext:value-type="float">
            <text:p>37.792</text:p>
          </table:table-cell>
          <table:table-cell table:style-name="ce5" office:value-type="float" office:value="709225" calcext:value-type="float">
            <text:p>709225</text:p>
          </table:table-cell>
          <table:table-cell/>
          <table:table-cell table:style-name="ce6" office:value-type="float" office:value="1024" calcext:value-type="float">
            <text:p>1024</text:p>
          </table:table-cell>
          <table:table-cell table:style-name="ce2" office:value-type="float" office:value="37.7786" calcext:value-type="float">
            <text:p>37.7786</text:p>
          </table:table-cell>
          <table:table-cell table:style-name="ce2" office:value-type="float" office:value="37.912" calcext:value-type="float">
            <text:p>37.912</text:p>
          </table:table-cell>
          <table:table-cell table:style-name="ce2" office:value-type="float" office:value="37.7818" calcext:value-type="float">
            <text:p>37.7818</text:p>
          </table:table-cell>
          <table:table-cell table:style-name="ce2" office:value-type="float" office:value="37.7701" calcext:value-type="float">
            <text:p>37.7701</text:p>
          </table:table-cell>
          <table:table-cell table:style-name="ce2" office:value-type="float" office:value="37.810625" calcext:value-type="float">
            <text:p>37.810625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static</text:p>
          </table:table-cell>
          <table:table-cell table:style-name="ce2" office:value-type="float" office:value="256" calcext:value-type="float">
            <text:p>256</text:p>
          </table:table-cell>
          <table:table-cell table:style-name="ce4" office:value-type="float" office:value="37.6816" calcext:value-type="float">
            <text:p>37.682</text:p>
          </table:table-cell>
          <table:table-cell table:style-name="ce5" office:value-type="float" office:value="683801" calcext:value-type="float">
            <text:p>683801</text:p>
          </table:table-cell>
          <table:table-cell/>
          <table:table-cell table:style-name="ce6" office:value-type="float" office:value="2048" calcext:value-type="float">
            <text:p>2048</text:p>
          </table:table-cell>
          <table:table-cell table:style-name="ce2" office:value-type="float" office:value="37.6871" calcext:value-type="float">
            <text:p>37.6871</text:p>
          </table:table-cell>
          <table:table-cell table:style-name="ce2" office:value-type="float" office:value="37.858" calcext:value-type="float">
            <text:p>37.858</text:p>
          </table:table-cell>
          <table:table-cell table:style-name="ce2" office:value-type="float" office:value="37.7567" calcext:value-type="float">
            <text:p>37.7567</text:p>
          </table:table-cell>
          <table:table-cell table:style-name="ce2" office:value-type="float" office:value="37.7597" calcext:value-type="float">
            <text:p>37.7597</text:p>
          </table:table-cell>
          <table:table-cell table:style-name="ce2" office:value-type="float" office:value="37.765375" calcext:value-type="float">
            <text:p>37.765375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static</text:p>
          </table:table-cell>
          <table:table-cell table:style-name="ce2" office:value-type="float" office:value="512" calcext:value-type="float">
            <text:p>512</text:p>
          </table:table-cell>
          <table:table-cell table:style-name="ce4" office:value-type="float" office:value="37.7746" calcext:value-type="float">
            <text:p>37.775</text:p>
          </table:table-cell>
          <table:table-cell table:style-name="ce5" office:value-type="float" office:value="705999" calcext:value-type="float">
            <text:p>705999</text:p>
          </table:table-cell>
          <table:table-cell/>
          <table:table-cell table:style-name="ce6" office:value-type="float" office:value="4096" calcext:value-type="float">
            <text:p>4096</text:p>
          </table:table-cell>
          <table:table-cell table:style-name="ce2" office:value-type="float" office:value="37.7429" calcext:value-type="float">
            <text:p>37.7429</text:p>
          </table:table-cell>
          <table:table-cell table:style-name="ce2" office:value-type="float" office:value="38.282" calcext:value-type="float">
            <text:p>38.282</text:p>
          </table:table-cell>
          <table:table-cell table:style-name="ce2" office:value-type="float" office:value="37.7148" calcext:value-type="float">
            <text:p>37.7148</text:p>
          </table:table-cell>
          <table:table-cell table:style-name="ce2" office:value-type="float" office:value="37.7279" calcext:value-type="float">
            <text:p>37.7279</text:p>
          </table:table-cell>
          <table:table-cell table:style-name="ce2" office:value-type="float" office:value="37.8669" calcext:value-type="float">
            <text:p>37.8669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static</text:p>
          </table:table-cell>
          <table:table-cell table:style-name="ce2" office:value-type="float" office:value="1024" calcext:value-type="float">
            <text:p>1024</text:p>
          </table:table-cell>
          <table:table-cell table:style-name="ce4" office:value-type="float" office:value="37.7701" calcext:value-type="float">
            <text:p>37.770</text:p>
          </table:table-cell>
          <table:table-cell table:style-name="ce5" office:value-type="float" office:value="694257" calcext:value-type="float">
            <text:p>694257</text:p>
          </table:table-cell>
          <table:table-cell/>
          <table:table-cell table:style-name="ce6" office:value-type="string" calcext:value-type="string">
            <text:p>Grand Total</text:p>
          </table:table-cell>
          <table:table-cell table:style-name="ce2" office:value-type="float" office:value="37.75768" calcext:value-type="float">
            <text:p>37.75768</text:p>
          </table:table-cell>
          <table:table-cell table:style-name="ce2" office:value-type="float" office:value="38.1023" calcext:value-type="float">
            <text:p>38.1023</text:p>
          </table:table-cell>
          <table:table-cell table:style-name="ce2" office:value-type="float" office:value="37.7218111111111" calcext:value-type="float">
            <text:p>37.7218111111111</text:p>
          </table:table-cell>
          <table:table-cell table:style-name="ce2" office:value-type="float" office:value="37.75089" calcext:value-type="float">
            <text:p>37.75089</text:p>
          </table:table-cell>
          <table:table-cell table:style-name="ce2" office:value-type="float" office:value="37.8360256410256" calcext:value-type="float">
            <text:p>37.8360256410256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static</text:p>
          </table:table-cell>
          <table:table-cell table:style-name="ce2" office:value-type="float" office:value="2048" calcext:value-type="float">
            <text:p>2048</text:p>
          </table:table-cell>
          <table:table-cell table:style-name="ce4" office:value-type="float" office:value="37.7597" calcext:value-type="float">
            <text:p>37.760</text:p>
          </table:table-cell>
          <table:table-cell table:style-name="ce5" office:value-type="float" office:value="706819" calcext:value-type="float">
            <text:p>706819</text:p>
          </table:table-cell>
          <table:table-cell/>
          <table:table-cell>
            <draw:frame table:end-cell-address="results_optimization.L44" table:end-x="43.43pt" table:end-y="12.73pt" draw:z-index="0" draw:name="Chart 4" draw:style-name="gr1" draw:text-style-name="P1" svg:width="422.22pt" svg:height="215.23pt" svg:x="3.26pt" svg:y="11.25pt">
              <draw:object draw:notify-on-update-of-ranges="results_optimization.F18:results_optimization.F28 results_optimization.G18:results_optimization.G28 results_optimization.H18:results_optimization.H28 results_optimization.I18:results_optimization.I28 results_optimization.J18:results_optimization.J28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tatic</text:p>
          </table:table-cell>
          <table:table-cell table:style-name="ce2" office:value-type="float" office:value="4096" calcext:value-type="float">
            <text:p>4096</text:p>
          </table:table-cell>
          <table:table-cell table:style-name="ce4" office:value-type="float" office:value="37.7279" calcext:value-type="float">
            <text:p>37.728</text:p>
          </table:table-cell>
          <table:table-cell table:style-name="ce5" office:value-type="float" office:value="705789" calcext:value-type="float">
            <text:p>705789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ffinity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float" office:value="37.911" calcext:value-type="float">
            <text:p>37.911</text:p>
          </table:table-cell>
          <table:table-cell table:style-name="ce5" office:value-type="float" office:value="707948" calcext:value-type="float">
            <text:p>707948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ffinity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37.7252" calcext:value-type="float">
            <text:p>37.725</text:p>
          </table:table-cell>
          <table:table-cell table:style-name="ce5" office:value-type="float" office:value="703898" calcext:value-type="float">
            <text:p>703898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ffinity</text:p>
          </table:table-cell>
          <table:table-cell table:style-name="ce2" office:value-type="float" office:value="32" calcext:value-type="float">
            <text:p>32</text:p>
          </table:table-cell>
          <table:table-cell table:style-name="ce4" office:value-type="float" office:value="37.7405" calcext:value-type="float">
            <text:p>37.741</text:p>
          </table:table-cell>
          <table:table-cell table:style-name="ce5" office:value-type="float" office:value="699672" calcext:value-type="float">
            <text:p>699672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ffinity</text:p>
          </table:table-cell>
          <table:table-cell table:style-name="ce2" office:value-type="float" office:value="64" calcext:value-type="float">
            <text:p>64</text:p>
          </table:table-cell>
          <table:table-cell table:style-name="ce4" office:value-type="float" office:value="37.6909" calcext:value-type="float">
            <text:p>37.691</text:p>
          </table:table-cell>
          <table:table-cell table:style-name="ce5" office:value-type="float" office:value="695752" calcext:value-type="float">
            <text:p>695752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ffinity</text:p>
          </table:table-cell>
          <table:table-cell table:style-name="ce2" office:value-type="float" office:value="128" calcext:value-type="float">
            <text:p>128</text:p>
          </table:table-cell>
          <table:table-cell table:style-name="ce4" office:value-type="float" office:value="37.8039" calcext:value-type="float">
            <text:p>37.804</text:p>
          </table:table-cell>
          <table:table-cell table:style-name="ce5" office:value-type="float" office:value="708986" calcext:value-type="float">
            <text:p>708986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ffinity</text:p>
          </table:table-cell>
          <table:table-cell table:style-name="ce2" office:value-type="float" office:value="256" calcext:value-type="float">
            <text:p>256</text:p>
          </table:table-cell>
          <table:table-cell table:style-name="ce4" office:value-type="float" office:value="37.7578" calcext:value-type="float">
            <text:p>37.758</text:p>
          </table:table-cell>
          <table:table-cell table:style-name="ce5" office:value-type="float" office:value="673214" calcext:value-type="float">
            <text:p>673214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ffinity</text:p>
          </table:table-cell>
          <table:table-cell table:style-name="ce2" office:value-type="float" office:value="512" calcext:value-type="float">
            <text:p>512</text:p>
          </table:table-cell>
          <table:table-cell table:style-name="ce4" office:value-type="float" office:value="37.7389" calcext:value-type="float">
            <text:p>37.739</text:p>
          </table:table-cell>
          <table:table-cell table:style-name="ce5" office:value-type="float" office:value="709656" calcext:value-type="float">
            <text:p>709656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ffinity</text:p>
          </table:table-cell>
          <table:table-cell table:style-name="ce2" office:value-type="float" office:value="1024" calcext:value-type="float">
            <text:p>1024</text:p>
          </table:table-cell>
          <table:table-cell table:style-name="ce4" office:value-type="float" office:value="37.7786" calcext:value-type="float">
            <text:p>37.779</text:p>
          </table:table-cell>
          <table:table-cell table:style-name="ce5" office:value-type="float" office:value="710550" calcext:value-type="float">
            <text:p>71055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ffinity</text:p>
          </table:table-cell>
          <table:table-cell table:style-name="ce2" office:value-type="float" office:value="2048" calcext:value-type="float">
            <text:p>2048</text:p>
          </table:table-cell>
          <table:table-cell table:style-name="ce4" office:value-type="float" office:value="37.6871" calcext:value-type="float">
            <text:p>37.687</text:p>
          </table:table-cell>
          <table:table-cell table:style-name="ce5" office:value-type="float" office:value="707791" calcext:value-type="float">
            <text:p>70779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ffinity</text:p>
          </table:table-cell>
          <table:table-cell table:style-name="ce2" office:value-type="float" office:value="4096" calcext:value-type="float">
            <text:p>4096</text:p>
          </table:table-cell>
          <table:table-cell table:style-name="ce4" office:value-type="float" office:value="37.7429" calcext:value-type="float">
            <text:p>37.743</text:p>
          </table:table-cell>
          <table:table-cell table:style-name="ce5" office:value-type="float" office:value="705323" calcext:value-type="float">
            <text:p>705323</text:p>
          </table:table-cell>
          <table:table-cell table:number-columns-repeated="1020"/>
        </table:table-row>
        <table:table-row table:style-name="ro1" table:number-rows-repeated="960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ExternalData_1" table:base-cell-address="$results_scalability.$A$1" table:cell-range-address="$results_optimization.$A$1:.$D$40"/>
        </table:named-expressions>
        <calcext:conditional-formats>
          <calcext:conditional-format calcext:target-range-address="results_optimization.C2:results_optimization.D40">
            <calcext:color-scale>
              <calcext:color-scale-entry calcext:value="0" calcext:type="minimum" calcext:color="#63be7b"/>
              <calcext:color-scale-entry calcext:value="50" calcext:type="percentile" calcext:color="#ffeb84"/>
              <calcext:color-scale-entry calcext:value="0" calcext:type="maximum" calcext:color="#f8696b"/>
            </calcext:color-scale>
          </calcext:conditional-format>
        </calcext:conditional-formats>
      </table:table>
      <table:table table:name="results_grain_sweep" table:style-name="ta3"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column table:style-name="co3" table:default-cell-style-name="Default"/>
        <table:table-column table:style-name="co5" table:number-columns-repeated="22" table:default-cell-style-name="Default"/>
        <table:table-column table:style-name="co6" table:number-columns-repeated="998" table:default-cell-style-name="Default"/>
        <table:table-row table:style-name="ro1">
          <table:table-cell table:style-name="ce1" office:value-type="string" calcext:value-type="string">
            <text:p>Partitioner</text:p>
          </table:table-cell>
          <table:table-cell table:style-name="ce1" office:value-type="string" calcext:value-type="string">
            <text:p>GrainSize</text:p>
          </table:table-cell>
          <table:table-cell table:style-name="ce1" office:value-type="string" calcext:value-type="string">
            <text:p>Time(s)</text:p>
          </table:table-cell>
          <table:table-cell table:style-name="ce1" office:value-type="string" calcext:value-type="string">
            <text:p>Energy(J)</text:p>
          </table:table-cell>
          <table:table-cell table:number-columns-repeated="1020"/>
        </table:table-row>
        <table:table-row table:style-name="ro1" table:visibility="collapse">
          <table:table-cell table:style-name="ce2" office:value-type="string" calcext:value-type="string">
            <text:p>auto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7.6954" calcext:value-type="float">
            <text:p>37.6954</text:p>
          </table:table-cell>
          <table:table-cell table:style-name="ce2" office:value-type="float" office:value="672199" calcext:value-type="float">
            <text:p>672199</text:p>
          </table:table-cell>
          <table:table-cell table:number-columns-repeated="1020"/>
        </table:table-row>
        <table:table-row table:style-name="ro1" table:visibility="collapse">
          <table:table-cell table:style-name="ce2" office:value-type="string" calcext:value-type="string">
            <text:p>auto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7.7317" calcext:value-type="float">
            <text:p>37.7317</text:p>
          </table:table-cell>
          <table:table-cell table:style-name="ce2" office:value-type="float" office:value="672791" calcext:value-type="float">
            <text:p>672791</text:p>
          </table:table-cell>
          <table:table-cell table:number-columns-repeated="1020"/>
        </table:table-row>
        <table:table-row table:style-name="ro1" table:visibility="collapse">
          <table:table-cell table:style-name="ce2" office:value-type="string" calcext:value-type="string">
            <text:p>auto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37.6845" calcext:value-type="float">
            <text:p>37.6845</text:p>
          </table:table-cell>
          <table:table-cell table:style-name="ce2" office:value-type="float" office:value="671501" calcext:value-type="float">
            <text:p>671501</text:p>
          </table:table-cell>
          <table:table-cell table:number-columns-repeated="1020"/>
        </table:table-row>
        <table:table-row table:style-name="ro1" table:visibility="collapse">
          <table:table-cell table:style-name="ce2" office:value-type="string" calcext:value-type="string">
            <text:p>auto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37.7101" calcext:value-type="float">
            <text:p>37.7101</text:p>
          </table:table-cell>
          <table:table-cell table:style-name="ce2" office:value-type="float" office:value="679540" calcext:value-type="float">
            <text:p>679540</text:p>
          </table:table-cell>
          <table:table-cell table:number-columns-repeated="1020"/>
        </table:table-row>
        <table:table-row table:style-name="ro1" table:visibility="collapse">
          <table:table-cell table:style-name="ce2" office:value-type="string" calcext:value-type="string">
            <text:p>auto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38.463" calcext:value-type="float">
            <text:p>38.463</text:p>
          </table:table-cell>
          <table:table-cell table:style-name="ce2" office:value-type="float" office:value="690931" calcext:value-type="float">
            <text:p>690931</text:p>
          </table:table-cell>
          <table:table-cell table:number-columns-repeated="1020"/>
        </table:table-row>
        <table:table-row table:style-name="ro1" table:visibility="collapse">
          <table:table-cell table:style-name="ce2" office:value-type="string" calcext:value-type="string">
            <text:p>auto</text:p>
          </table:table-cell>
          <table:table-cell table:style-name="ce2" office:value-type="float" office:value="256" calcext:value-type="float">
            <text:p>256</text:p>
          </table:table-cell>
          <table:table-cell table:style-name="ce2" office:value-type="float" office:value="38.17" calcext:value-type="float">
            <text:p>38.17</text:p>
          </table:table-cell>
          <table:table-cell table:style-name="ce2" office:value-type="float" office:value="670448" calcext:value-type="float">
            <text:p>670448</text:p>
          </table:table-cell>
          <table:table-cell table:number-columns-repeated="1020"/>
        </table:table-row>
        <table:table-row table:style-name="ro1" table:visibility="collapse">
          <table:table-cell table:style-name="ce2" office:value-type="string" calcext:value-type="string">
            <text:p>auto</text:p>
          </table:table-cell>
          <table:table-cell table:style-name="ce2" office:value-type="float" office:value="512" calcext:value-type="float">
            <text:p>512</text:p>
          </table:table-cell>
          <table:table-cell table:style-name="ce2" office:value-type="float" office:value="38.283" calcext:value-type="float">
            <text:p>38.283</text:p>
          </table:table-cell>
          <table:table-cell table:style-name="ce2" office:value-type="float" office:value="682516" calcext:value-type="float">
            <text:p>682516</text:p>
          </table:table-cell>
          <table:table-cell table:number-columns-repeated="1020"/>
        </table:table-row>
        <table:table-row table:style-name="ro1" table:visibility="collapse">
          <table:table-cell table:style-name="ce2" office:value-type="string" calcext:value-type="string">
            <text:p>auto</text:p>
          </table:table-cell>
          <table:table-cell table:style-name="ce2" office:value-type="float" office:value="1024" calcext:value-type="float">
            <text:p>1024</text:p>
          </table:table-cell>
          <table:table-cell table:style-name="ce2" office:value-type="float" office:value="38.444" calcext:value-type="float">
            <text:p>38.444</text:p>
          </table:table-cell>
          <table:table-cell table:style-name="ce2" office:value-type="float" office:value="678730" calcext:value-type="float">
            <text:p>678730</text:p>
          </table:table-cell>
          <table:table-cell table:number-columns-repeated="1020"/>
        </table:table-row>
        <table:table-row table:style-name="ro1" table:visibility="collapse">
          <table:table-cell table:style-name="ce2" office:value-type="string" calcext:value-type="string">
            <text:p>auto</text:p>
          </table:table-cell>
          <table:table-cell table:style-name="ce2" office:value-type="float" office:value="2048" calcext:value-type="float">
            <text:p>2048</text:p>
          </table:table-cell>
          <table:table-cell table:style-name="ce2" office:value-type="float" office:value="38.4222" calcext:value-type="float">
            <text:p>38.4222</text:p>
          </table:table-cell>
          <table:table-cell table:style-name="ce2" office:value-type="float" office:value="681428" calcext:value-type="float">
            <text:p>681428</text:p>
          </table:table-cell>
          <table:table-cell table:number-columns-repeated="1020"/>
        </table:table-row>
        <table:table-row table:style-name="ro1" table:visibility="collapse">
          <table:table-cell table:style-name="ce2" office:value-type="string" calcext:value-type="string">
            <text:p>auto</text:p>
          </table:table-cell>
          <table:table-cell table:style-name="ce2" office:value-type="float" office:value="4096" calcext:value-type="float">
            <text:p>4096</text:p>
          </table:table-cell>
          <table:table-cell table:style-name="ce2" office:value-type="float" office:value="38.418" calcext:value-type="float">
            <text:p>38.418</text:p>
          </table:table-cell>
          <table:table-cell table:style-name="ce2" office:value-type="float" office:value="686459" calcext:value-type="float">
            <text:p>686459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impl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8.13" calcext:value-type="float">
            <text:p>38.13</text:p>
          </table:table-cell>
          <table:table-cell table:style-name="ce2" office:value-type="float" office:value="666834" calcext:value-type="float">
            <text:p>666834</text:p>
          </table:table-cell>
          <table:table-cell/>
          <table:table-cell>
            <draw:frame table:end-cell-address="results_grain_sweep.N56" table:end-x="41.22pt" table:end-y="1.47pt" draw:z-index="0" draw:name="Chart 6" draw:style-name="gr1" draw:text-style-name="P1" svg:width="389.96pt" svg:height="415.47pt" svg:x="3.26pt" svg:y="13.49pt">
              <draw:object draw:notify-on-update-of-ranges="results_grain_sweep.C2:results_grain_sweep.C34 results_grain_sweep.B2:results_grain_sweep.B34" xlink:href="./Object 6" xlink:type="simple" xlink:show="embed" xlink:actuate="onLoad">
                <loext:p/>
              </draw:object>
              <draw:image xlink:href="./ObjectReplacements/Object 6" xlink:type="simple" xlink:show="embed" xlink:actuate="onLoad"/>
            </draw:frame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imple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38.246" calcext:value-type="float">
            <text:p>38.246</text:p>
          </table:table-cell>
          <table:table-cell table:style-name="ce2" office:value-type="float" office:value="680640" calcext:value-type="float">
            <text:p>68064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imple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38.371" calcext:value-type="float">
            <text:p>38.371</text:p>
          </table:table-cell>
          <table:table-cell table:style-name="ce2" office:value-type="float" office:value="684695" calcext:value-type="float">
            <text:p>684695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imple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38.547" calcext:value-type="float">
            <text:p>38.547</text:p>
          </table:table-cell>
          <table:table-cell table:style-name="ce2" office:value-type="float" office:value="685298" calcext:value-type="float">
            <text:p>685298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imple</text:p>
          </table:table-cell>
          <table:table-cell table:style-name="ce2" office:value-type="float" office:value="256" calcext:value-type="float">
            <text:p>256</text:p>
          </table:table-cell>
          <table:table-cell table:style-name="ce2" office:value-type="float" office:value="38.079" calcext:value-type="float">
            <text:p>38.079</text:p>
          </table:table-cell>
          <table:table-cell table:style-name="ce2" office:value-type="float" office:value="670791" calcext:value-type="float">
            <text:p>67079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imple</text:p>
          </table:table-cell>
          <table:table-cell table:style-name="ce2" office:value-type="float" office:value="512" calcext:value-type="float">
            <text:p>512</text:p>
          </table:table-cell>
          <table:table-cell table:style-name="ce2" office:value-type="float" office:value="38.5555" calcext:value-type="float">
            <text:p>38.5555</text:p>
          </table:table-cell>
          <table:table-cell table:style-name="ce2" office:value-type="float" office:value="682029" calcext:value-type="float">
            <text:p>682029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imple</text:p>
          </table:table-cell>
          <table:table-cell table:style-name="ce2" office:value-type="float" office:value="1024" calcext:value-type="float">
            <text:p>1024</text:p>
          </table:table-cell>
          <table:table-cell table:style-name="ce2" office:value-type="float" office:value="38.526" calcext:value-type="float">
            <text:p>38.526</text:p>
          </table:table-cell>
          <table:table-cell table:style-name="ce2" office:value-type="float" office:value="679342" calcext:value-type="float">
            <text:p>679342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imple</text:p>
          </table:table-cell>
          <table:table-cell table:style-name="ce2" office:value-type="float" office:value="2048" calcext:value-type="float">
            <text:p>2048</text:p>
          </table:table-cell>
          <table:table-cell table:style-name="ce2" office:value-type="float" office:value="38.635" calcext:value-type="float">
            <text:p>38.635</text:p>
          </table:table-cell>
          <table:table-cell table:style-name="ce2" office:value-type="float" office:value="695298" calcext:value-type="float">
            <text:p>695298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imple</text:p>
          </table:table-cell>
          <table:table-cell table:style-name="ce2" office:value-type="float" office:value="4096" calcext:value-type="float">
            <text:p>4096</text:p>
          </table:table-cell>
          <table:table-cell table:style-name="ce2" office:value-type="float" office:value="38.6527" calcext:value-type="float">
            <text:p>38.6527</text:p>
          </table:table-cell>
          <table:table-cell table:style-name="ce2" office:value-type="float" office:value="679770" calcext:value-type="float">
            <text:p>679770</text:p>
          </table:table-cell>
          <table:table-cell table:number-columns-repeated="1020"/>
        </table:table-row>
        <table:table-row table:style-name="ro1" table:visibility="collapse">
          <table:table-cell table:style-name="ce2" office:value-type="string" calcext:value-type="string">
            <text:p>static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8.369" calcext:value-type="float">
            <text:p>38.369</text:p>
          </table:table-cell>
          <table:table-cell table:style-name="ce2" office:value-type="float" office:value="696905" calcext:value-type="float">
            <text:p>696905</text:p>
          </table:table-cell>
          <table:table-cell table:number-columns-repeated="1020"/>
        </table:table-row>
        <table:table-row table:style-name="ro1" table:visibility="collapse">
          <table:table-cell table:style-name="ce2" office:value-type="string" calcext:value-type="string">
            <text:p>static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8.361" calcext:value-type="float">
            <text:p>38.361</text:p>
          </table:table-cell>
          <table:table-cell table:style-name="ce2" office:value-type="float" office:value="684366" calcext:value-type="float">
            <text:p>684366</text:p>
          </table:table-cell>
          <table:table-cell table:number-columns-repeated="1020"/>
        </table:table-row>
        <table:table-row table:style-name="ro1" table:visibility="collapse">
          <table:table-cell table:style-name="ce2" office:value-type="string" calcext:value-type="string">
            <text:p>static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37.865" calcext:value-type="float">
            <text:p>37.865</text:p>
          </table:table-cell>
          <table:table-cell table:style-name="ce2" office:value-type="float" office:value="669826" calcext:value-type="float">
            <text:p>669826</text:p>
          </table:table-cell>
          <table:table-cell table:number-columns-repeated="1020"/>
        </table:table-row>
        <table:table-row table:style-name="ro1" table:visibility="collapse">
          <table:table-cell table:style-name="ce2" office:value-type="string" calcext:value-type="string">
            <text:p>static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38.171" calcext:value-type="float">
            <text:p>38.171</text:p>
          </table:table-cell>
          <table:table-cell table:style-name="ce2" office:value-type="float" office:value="667949" calcext:value-type="float">
            <text:p>667949</text:p>
          </table:table-cell>
          <table:table-cell table:number-columns-repeated="1020"/>
        </table:table-row>
        <table:table-row table:style-name="ro1" table:visibility="collapse">
          <table:table-cell table:style-name="ce2" office:value-type="string" calcext:value-type="string">
            <text:p>static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38.145" calcext:value-type="float">
            <text:p>38.145</text:p>
          </table:table-cell>
          <table:table-cell table:style-name="ce2" office:value-type="float" office:value="680907" calcext:value-type="float">
            <text:p>680907</text:p>
          </table:table-cell>
          <table:table-cell table:number-columns-repeated="1020"/>
        </table:table-row>
        <table:table-row table:style-name="ro1" table:visibility="collapse">
          <table:table-cell table:style-name="ce2" office:value-type="string" calcext:value-type="string">
            <text:p>static</text:p>
          </table:table-cell>
          <table:table-cell table:style-name="ce2" office:value-type="float" office:value="256" calcext:value-type="float">
            <text:p>256</text:p>
          </table:table-cell>
          <table:table-cell table:style-name="ce2" office:value-type="float" office:value="37.6712" calcext:value-type="float">
            <text:p>37.6712</text:p>
          </table:table-cell>
          <table:table-cell table:style-name="ce2" office:value-type="float" office:value="671609" calcext:value-type="float">
            <text:p>671609</text:p>
          </table:table-cell>
          <table:table-cell table:number-columns-repeated="1020"/>
        </table:table-row>
        <table:table-row table:style-name="ro1" table:visibility="collapse">
          <table:table-cell table:style-name="ce2" office:value-type="string" calcext:value-type="string">
            <text:p>static</text:p>
          </table:table-cell>
          <table:table-cell table:style-name="ce2" office:value-type="float" office:value="512" calcext:value-type="float">
            <text:p>512</text:p>
          </table:table-cell>
          <table:table-cell table:style-name="ce2" office:value-type="float" office:value="38.272" calcext:value-type="float">
            <text:p>38.272</text:p>
          </table:table-cell>
          <table:table-cell table:style-name="ce2" office:value-type="float" office:value="672362" calcext:value-type="float">
            <text:p>672362</text:p>
          </table:table-cell>
          <table:table-cell table:number-columns-repeated="1020"/>
        </table:table-row>
        <table:table-row table:style-name="ro1" table:visibility="collapse">
          <table:table-cell table:style-name="ce2" office:value-type="string" calcext:value-type="string">
            <text:p>static</text:p>
          </table:table-cell>
          <table:table-cell table:style-name="ce2" office:value-type="float" office:value="1024" calcext:value-type="float">
            <text:p>1024</text:p>
          </table:table-cell>
          <table:table-cell table:style-name="ce2" office:value-type="float" office:value="37.7371" calcext:value-type="float">
            <text:p>37.7371</text:p>
          </table:table-cell>
          <table:table-cell table:style-name="ce2" office:value-type="float" office:value="671105" calcext:value-type="float">
            <text:p>671105</text:p>
          </table:table-cell>
          <table:table-cell table:number-columns-repeated="1020"/>
        </table:table-row>
        <table:table-row table:style-name="ro1" table:visibility="collapse">
          <table:table-cell table:style-name="ce2" office:value-type="string" calcext:value-type="string">
            <text:p>static</text:p>
          </table:table-cell>
          <table:table-cell table:style-name="ce2" office:value-type="float" office:value="2048" calcext:value-type="float">
            <text:p>2048</text:p>
          </table:table-cell>
          <table:table-cell table:style-name="ce2" office:value-type="float" office:value="38.083" calcext:value-type="float">
            <text:p>38.083</text:p>
          </table:table-cell>
          <table:table-cell table:style-name="ce2" office:value-type="float" office:value="681319" calcext:value-type="float">
            <text:p>681319</text:p>
          </table:table-cell>
          <table:table-cell table:number-columns-repeated="1020"/>
        </table:table-row>
        <table:table-row table:style-name="ro1" table:visibility="collapse">
          <table:table-cell table:style-name="ce2" office:value-type="string" calcext:value-type="string">
            <text:p>static</text:p>
          </table:table-cell>
          <table:table-cell table:style-name="ce2" office:value-type="float" office:value="4096" calcext:value-type="float">
            <text:p>4096</text:p>
          </table:table-cell>
          <table:table-cell table:style-name="ce2" office:value-type="float" office:value="37.6906" calcext:value-type="float">
            <text:p>37.6906</text:p>
          </table:table-cell>
          <table:table-cell table:style-name="ce2" office:value-type="float" office:value="669820" calcext:value-type="float">
            <text:p>669820</text:p>
          </table:table-cell>
          <table:table-cell table:number-columns-repeated="1020"/>
        </table:table-row>
        <table:table-row table:style-name="ro1" table:visibility="collapse">
          <table:table-cell table:style-name="ce2" office:value-type="string" calcext:value-type="string">
            <text:p>affinity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7.942" calcext:value-type="float">
            <text:p>37.942</text:p>
          </table:table-cell>
          <table:table-cell table:style-name="ce2" office:value-type="float" office:value="687530" calcext:value-type="float">
            <text:p>687530</text:p>
          </table:table-cell>
          <table:table-cell table:number-columns-repeated="1020"/>
        </table:table-row>
        <table:table-row table:style-name="ro1" table:visibility="collapse">
          <table:table-cell table:style-name="ce2" office:value-type="string" calcext:value-type="string">
            <text:p>affinity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7.8184" calcext:value-type="float">
            <text:p>37.8184</text:p>
          </table:table-cell>
          <table:table-cell table:style-name="ce2" office:value-type="float" office:value="672008" calcext:value-type="float">
            <text:p>672008</text:p>
          </table:table-cell>
          <table:table-cell table:number-columns-repeated="1020"/>
        </table:table-row>
        <table:table-row table:style-name="ro1" table:visibility="collapse">
          <table:table-cell table:style-name="ce2" office:value-type="string" calcext:value-type="string">
            <text:p>affinity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37.7738" calcext:value-type="float">
            <text:p>37.7738</text:p>
          </table:table-cell>
          <table:table-cell table:style-name="ce2" office:value-type="float" office:value="675818" calcext:value-type="float">
            <text:p>675818</text:p>
          </table:table-cell>
          <table:table-cell table:number-columns-repeated="1020"/>
        </table:table-row>
        <table:table-row table:style-name="ro1" table:visibility="collapse">
          <table:table-cell table:style-name="ce2" office:value-type="string" calcext:value-type="string">
            <text:p>affinity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37.7239" calcext:value-type="float">
            <text:p>37.7239</text:p>
          </table:table-cell>
          <table:table-cell table:style-name="ce2" office:value-type="float" office:value="694521" calcext:value-type="float">
            <text:p>694521</text:p>
          </table:table-cell>
          <table:table-cell table:number-columns-repeated="1020"/>
        </table:table-row>
        <table:table-row table:style-name="ro1" table:number-rows-repeated="966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ExternalData_1" table:base-cell-address="$results_scalability.$A$1" table:cell-range-address="$results_grain_sweep.$A$1:.$D$34"/>
        </table:named-expressions>
      </table:table>
      <table:table table:name="Sheet1" table:style-name="ta4">
        <table:table-column table:style-name="co5" table:number-columns-repeated="26" table:default-cell-style-name="Default"/>
        <table:table-column table:style-name="co6" table:number-columns-repeated="998" table:default-cell-style-name="Default"/>
        <table:table-row table:style-name="ro1" table:number-rows-repeated="1000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Table_1" table:target-range-address="results_scalability.A1:results_scalability.D40"/>
        <table:database-range table:name="Table_2" table:target-range-address="results_optimization.A1:results_optimization.D40"/>
        <table:database-range table:name="Table_3" table:target-range-address="results_grain_sweep.A1:results_grain_sweep.D34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ptos Narrow" svg:font-family="'Aptos Narrow'"/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3" loext:min-decimal-places="3" number:min-integer-digits="1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ptos Narrow" fo:font-family="'Aptos Narrow'" fo:font-size="11pt" style:font-name-asian="Linux Libertine G" style:font-family-asian="'Linux Libertine G'" style:font-family-generic-asian="system" style:font-pitch-asian="variable" style:font-size-asian="11pt" style:font-name-complex="Aptos Narrow" style:font-family-complex="'Aptos Narrow'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792pt" fo:page-height="612pt" style:num-format="1" style:print-orientation="landscape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results_5f_scalability" style:display-name="PageStyle_results_scalabilit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sults_5f_optimization" style:display-name="PageStyle_results_optimizat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sults_5f_grain_5f_sweep" style:display-name="PageStyle_results_grain_sweep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12-12T22:17:03</meta:creation-date>
    <meta:initial-creator>NICOLAS MAIRE BRAVO</meta:initial-creator>
    <meta:document-statistic meta:table-count="4" meta:cell-count="526" meta:object-count="6"/>
    <meta:generator>LibreOfficeDev/6.0.5.2$Linux_X86_64 LibreOffice_project/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symbol-type="automatic" chart:include-hidden-cells="false" chart:auto-position="true" chart:auto-size="true" chart:treat-empty-cells="use-zero"/>
    </style:style>
    <style:style style:name="ch3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'Aptos Narrow'" fo:font-size="9pt" style:font-family-asian="'Aptos Narrow'" style:font-size-asian="9pt" style:font-family-complex="'Aptos Narrow'" style:font-size-complex="9pt"/>
    </style:style>
    <style:style style:name="ch4" style:family="chart">
      <style:chart-properties chart:auto-position="true" style:rotation-angle="0"/>
      <style:text-properties fo:color="#000000" style:text-position="0% 100%" fo:font-family="'Aptos Narrow'" fo:font-size="10pt" style:font-family-asian="'Aptos Narrow'" style:font-size-asian="10pt" style:font-family-complex="'Aptos Narrow'" style:font-size-complex="10pt"/>
    </style:style>
    <style:style style:name="ch5" style:family="chart">
      <style:graphic-properties svg:stroke-width="0.018cm" svg:stroke-color="#b7b7b7"/>
    </style:style>
    <style:style style:name="ch6" style:family="chart">
      <style:chart-properties chart:auto-position="true" style:rotation-angle="90"/>
      <style:text-properties fo:color="#000000" style:text-position="0% 100%" fo:font-family="'Aptos Narrow'" fo:font-size="10pt" style:font-family-asian="'Aptos Narrow'" style:font-size-asian="10pt" style:font-family-complex="'Aptos Narrow'" style:font-size-complex="10pt"/>
    </style:style>
    <style:style style:name="ch7" style:family="chart" style:data-style-name="N0">
      <style:chart-properties chart:symbol-type="named-symbol" chart:symbol-name="circle" chart:symbol-width="0.247cm" chart:symbol-height="0.247cm" chart:link-data-style-to-source="true" chart:label-position="right">
        <chart:label-separator>
          <text:p>; </text:p>
        </chart:label-separator>
      </style:chart-properties>
      <style:graphic-properties draw:stroke="none" svg:stroke-width="0.053cm" svg:stroke-color="#156082" draw:fill-color="#156082"/>
      <style:text-properties fo:color="#000000" style:text-position="0% 100%" fo:font-family="'Aptos Narrow'" fo:font-size="10pt" style:font-family-asian="'Aptos Narrow'" style:font-size-asian="10pt" style:font-family-complex="'Aptos Narrow'" style:font-size-complex="10pt"/>
    </style:style>
    <style:style style:name="ch8" style:family="chart">
      <style:graphic-properties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3.758cm" svg:height="7.62cm" xlink:href=".." xlink:type="simple" chart:class="chart:scatter" chart:style-name="ch1">
        <chart:plot-area chart:style-name="ch2" table:cell-range-address="results_scalability.A2:results_scalability.A39 results_scalability.B2:results_scalability.B40" chart:data-source-has-labels="row" svg:x="1.335cm" svg:y="0.152cm" svg:width="12.148cm" svg:height="6.286cm">
          <chartooo:coordinate-region svg:x="1.992cm" svg:y="0.338cm" svg:width="11.251cm" svg:height="5.63cm"/>
          <chart:axis chart:dimension="x" chart:name="primary-x" chart:style-name="ch3">
            <chart:title svg:x="6.141cm" svg:y="6.591cm" chart:style-name="ch4">
              <text:p>Número de Hilos</text:p>
            </chart:title>
            <chart:grid chart:style-name="ch5" chart:class="major"/>
          </chart:axis>
          <chart:axis chart:dimension="y" chart:name="primary-y" chart:style-name="ch3">
            <chart:title svg:x="0.451cm" svg:y="4.127cm" chart:style-name="ch6">
              <text:p>Tiempo (s)</text:p>
            </chart:title>
            <chart:grid chart:style-name="ch5" chart:class="major"/>
          </chart:axis>
          <chart:series chart:style-name="ch7" chart:values-cell-range-address="results_scalability.B2:results_scalability.B40" loext:label-string="&quot;Time(s)&quot;" chart:class="chart:scatter">
            <chart:domain table:cell-range-address="results_scalability.A2:results_scalability.A39"/>
            <chart:data-point chart:repeated="3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ime(s)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results_scalability.A2:results_scalability.A39</svg:desc>
                </draw:g>
              </table:table-cell>
              <table:table-cell office:value-type="float" office:value="38.361">
                <text:p>38.361</text:p>
                <draw:g>
                  <svg:desc>results_scalability.B2:results_scalability.B4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7.8558">
                <text:p>37.855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7.919">
                <text:p>37.9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7.7511">
                <text:p>37.75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7.6998">
                <text:p>37.699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37.81003">
                <text:p>37.8100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37.694">
                <text:p>37.69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37.7004">
                <text:p>37.700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">
                <text:p>12</text:p>
              </table:table-cell>
              <table:table-cell office:value-type="float" office:value="37.7112">
                <text:p>37.711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6">
                <text:p>16</text:p>
              </table:table-cell>
              <table:table-cell office:value-type="float" office:value="37.7095">
                <text:p>37.709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">
                <text:p>20</text:p>
              </table:table-cell>
              <table:table-cell office:value-type="float" office:value="37.7282">
                <text:p>37.728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4">
                <text:p>24</text:p>
              </table:table-cell>
              <table:table-cell office:value-type="float" office:value="37.802">
                <text:p>37.80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8">
                <text:p>28</text:p>
              </table:table-cell>
              <table:table-cell office:value-type="float" office:value="37.68">
                <text:p>37.6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2">
                <text:p>32</text:p>
              </table:table-cell>
              <table:table-cell office:value-type="float" office:value="37.6879">
                <text:p>37.687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6">
                <text:p>36</text:p>
              </table:table-cell>
              <table:table-cell office:value-type="float" office:value="37.6572">
                <text:p>37.657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0">
                <text:p>40</text:p>
              </table:table-cell>
              <table:table-cell office:value-type="float" office:value="37.6758">
                <text:p>37.675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4">
                <text:p>44</text:p>
              </table:table-cell>
              <table:table-cell office:value-type="float" office:value="37.7638">
                <text:p>37.763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8">
                <text:p>48</text:p>
              </table:table-cell>
              <table:table-cell office:value-type="float" office:value="37.8032">
                <text:p>37.803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2">
                <text:p>52</text:p>
              </table:table-cell>
              <table:table-cell office:value-type="float" office:value="37.7162">
                <text:p>37.716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6">
                <text:p>56</text:p>
              </table:table-cell>
              <table:table-cell office:value-type="float" office:value="37.7923">
                <text:p>37.792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6">
                <text:p>56</text:p>
              </table:table-cell>
              <table:table-cell office:value-type="float" office:value="37.768">
                <text:p>37.76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0">
                <text:p>60</text:p>
              </table:table-cell>
              <table:table-cell office:value-type="float" office:value="37.7871">
                <text:p>37.787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4">
                <text:p>64</text:p>
              </table:table-cell>
              <table:table-cell office:value-type="float" office:value="37.7164">
                <text:p>37.716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8">
                <text:p>68</text:p>
              </table:table-cell>
              <table:table-cell office:value-type="float" office:value="37.7274">
                <text:p>37.727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2">
                <text:p>72</text:p>
              </table:table-cell>
              <table:table-cell office:value-type="float" office:value="37.6814">
                <text:p>37.681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6">
                <text:p>76</text:p>
              </table:table-cell>
              <table:table-cell office:value-type="float" office:value="37.7359">
                <text:p>37.735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0">
                <text:p>80</text:p>
              </table:table-cell>
              <table:table-cell office:value-type="float" office:value="37.942">
                <text:p>37.94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4">
                <text:p>84</text:p>
              </table:table-cell>
              <table:table-cell office:value-type="float" office:value="37.717">
                <text:p>37.71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8">
                <text:p>88</text:p>
              </table:table-cell>
              <table:table-cell office:value-type="float" office:value="37.7166">
                <text:p>37.716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2">
                <text:p>92</text:p>
              </table:table-cell>
              <table:table-cell office:value-type="float" office:value="37.6976">
                <text:p>37.697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6">
                <text:p>96</text:p>
              </table:table-cell>
              <table:table-cell office:value-type="float" office:value="37.6847">
                <text:p>37.684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00">
                <text:p>100</text:p>
              </table:table-cell>
              <table:table-cell office:value-type="float" office:value="37.665">
                <text:p>37.66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04">
                <text:p>104</text:p>
              </table:table-cell>
              <table:table-cell office:value-type="float" office:value="37.889">
                <text:p>37.88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8">
                <text:p>108</text:p>
              </table:table-cell>
              <table:table-cell office:value-type="float" office:value="37.7028">
                <text:p>37.702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12">
                <text:p>112</text:p>
              </table:table-cell>
              <table:table-cell office:value-type="float" office:value="37.7048">
                <text:p>37.704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16">
                <text:p>116</text:p>
              </table:table-cell>
              <table:table-cell office:value-type="float" office:value="38.027">
                <text:p>38.02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20">
                <text:p>120</text:p>
              </table:table-cell>
              <table:table-cell office:value-type="float" office:value="37.7364">
                <text:p>37.736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24">
                <text:p>124</text:p>
              </table:table-cell>
              <table:table-cell office:value-type="float" office:value="37.733">
                <text:p>37.73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37.6572">
                <text:p>37.657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symbol-type="automatic" chart:include-hidden-cells="false" chart:auto-position="true" chart:auto-size="true" chart:treat-empty-cells="use-zero"/>
    </style:style>
    <style:style style:name="ch3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'Aptos Narrow'" fo:font-size="9pt" style:font-family-asian="'Aptos Narrow'" style:font-size-asian="9pt" style:font-family-complex="'Aptos Narrow'" style:font-size-complex="9pt"/>
    </style:style>
    <style:style style:name="ch4" style:family="chart">
      <style:chart-properties chart:auto-position="true" style:rotation-angle="0"/>
      <style:text-properties fo:color="#000000" style:text-position="0% 100%" fo:font-family="'Aptos Narrow'" fo:font-size="10pt" style:font-family-asian="'Aptos Narrow'" style:font-size-asian="10pt" style:font-family-complex="'Aptos Narrow'" style:font-size-complex="10pt"/>
    </style:style>
    <style:style style:name="ch5" style:family="chart">
      <style:graphic-properties svg:stroke-width="0.018cm" svg:stroke-color="#b7b7b7"/>
    </style:style>
    <style:style style:name="ch6" style:family="chart">
      <style:chart-properties chart:auto-position="true" style:rotation-angle="90"/>
      <style:text-properties fo:color="#000000" style:text-position="0% 100%" fo:font-family="'Aptos Narrow'" fo:font-size="10pt" style:font-family-asian="'Aptos Narrow'" style:font-size-asian="10pt" style:font-family-complex="'Aptos Narrow'" style:font-size-complex="10pt"/>
    </style:style>
    <style:style style:name="ch7" style:family="chart" style:data-style-name="N0">
      <style:chart-properties chart:symbol-type="named-symbol" chart:symbol-name="circle" chart:symbol-width="0.247cm" chart:symbol-height="0.247cm" chart:link-data-style-to-source="true" chart:label-position="right">
        <chart:label-separator>
          <text:p>; </text:p>
        </chart:label-separator>
      </style:chart-properties>
      <style:graphic-properties draw:stroke="none" svg:stroke-width="0.053cm" svg:stroke-color="#156082" draw:fill-color="#156082"/>
      <style:text-properties fo:color="#000000" style:text-position="0% 100%" fo:font-family="'Aptos Narrow'" fo:font-size="10pt" style:font-family-asian="'Aptos Narrow'" style:font-size-asian="10pt" style:font-family-complex="'Aptos Narrow'" style:font-size-complex="10pt"/>
    </style:style>
    <style:style style:name="ch8" style:family="chart">
      <style:graphic-properties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3.626cm" svg:height="7.594cm" xlink:href=".." xlink:type="simple" chart:class="chart:scatter" chart:style-name="ch1">
        <chart:plot-area chart:style-name="ch2" table:cell-range-address="results_scalability.A2:results_scalability.A39 results_scalability.D2:results_scalability.D39" chart:data-source-has-labels="row" svg:x="1.332cm" svg:y="0.151cm" svg:width="12.022cm" svg:height="6.262cm">
          <chartooo:coordinate-region svg:x="2.147cm" svg:y="0.337cm" svg:width="10.967cm" svg:height="5.606cm"/>
          <chart:axis chart:dimension="x" chart:name="primary-x" chart:style-name="ch3">
            <chart:title svg:x="6.075cm" svg:y="6.565cm" chart:style-name="ch4">
              <text:p>Número de Hilos</text:p>
            </chart:title>
            <chart:grid chart:style-name="ch5" chart:class="major"/>
          </chart:axis>
          <chart:axis chart:dimension="y" chart:name="primary-y" chart:style-name="ch3">
            <chart:title svg:x="0.451cm" svg:y="5.066cm" chart:style-name="ch6">
              <text:p>Speedup (T_sec / T_par)</text:p>
            </chart:title>
            <chart:grid chart:style-name="ch5" chart:class="major"/>
          </chart:axis>
          <chart:series chart:style-name="ch7" chart:values-cell-range-address="results_scalability.D2:results_scalability.D39" loext:label-string="&quot;Speedup&quot;" chart:class="chart:scatter">
            <chart:domain table:cell-range-address="results_scalability.A2:results_scalability.A39"/>
            <chart:data-point chart:repeated="3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peedup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results_scalability.A2:results_scalability.A39</svg:desc>
                </draw:g>
              </table:table-cell>
              <table:table-cell office:value-type="float" office:value="1">
                <text:p>1</text:p>
                <draw:g>
                  <svg:desc>results_scalability.D2:results_scalability.D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01334537904363">
                <text:p>1.0133453790436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.01165642553865">
                <text:p>1.011656425538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.01615582062509">
                <text:p>1.0161558206250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.01753855458119">
                <text:p>1.0175385545811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.01457205931865">
                <text:p>1.0145720593186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.0176951238924">
                <text:p>1.017695123892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.01752236050546">
                <text:p>1.0175223605054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">
                <text:p>12</text:p>
              </table:table-cell>
              <table:table-cell office:value-type="float" office:value="1.01723095525998">
                <text:p>1.0172309552599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6">
                <text:p>16</text:p>
              </table:table-cell>
              <table:table-cell office:value-type="float" office:value="1.01727681353505">
                <text:p>1.0172768135350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">
                <text:p>20</text:p>
              </table:table-cell>
              <table:table-cell office:value-type="float" office:value="1.01677259980598">
                <text:p>1.0167725998059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4">
                <text:p>24</text:p>
              </table:table-cell>
              <table:table-cell office:value-type="float" office:value="1.01478757737686">
                <text:p>1.0147875773768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8">
                <text:p>28</text:p>
              </table:table-cell>
              <table:table-cell office:value-type="float" office:value="1.01807324840764">
                <text:p>1.0180732484076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2">
                <text:p>32</text:p>
              </table:table-cell>
              <table:table-cell office:value-type="float" office:value="1.01785984361028">
                <text:p>1.0178598436102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6">
                <text:p>36</text:p>
              </table:table-cell>
              <table:table-cell office:value-type="float" office:value="1.01868965297473">
                <text:p>1.0186896529747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0">
                <text:p>40</text:p>
              </table:table-cell>
              <table:table-cell office:value-type="float" office:value="1.01818674056025">
                <text:p>1.018186740560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4">
                <text:p>44</text:p>
              </table:table-cell>
              <table:table-cell office:value-type="float" office:value="1.01581408650612">
                <text:p>1.0158140865061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8">
                <text:p>48</text:p>
              </table:table-cell>
              <table:table-cell office:value-type="float" office:value="1.01475536462522">
                <text:p>1.0147553646252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2">
                <text:p>52</text:p>
              </table:table-cell>
              <table:table-cell office:value-type="float" office:value="1.01709610194028">
                <text:p>1.0170961019402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6">
                <text:p>56</text:p>
              </table:table-cell>
              <table:table-cell office:value-type="float" office:value="1.01504803888623">
                <text:p>1.0150480388862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6">
                <text:p>56</text:p>
              </table:table-cell>
              <table:table-cell office:value-type="float" office:value="1.01570112264351">
                <text:p>1.0157011226435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0">
                <text:p>60</text:p>
              </table:table-cell>
              <table:table-cell office:value-type="float" office:value="1.01518772279429">
                <text:p>1.0151877227942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4">
                <text:p>64</text:p>
              </table:table-cell>
              <table:table-cell office:value-type="float" office:value="1.01709070855119">
                <text:p>1.0170907085511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8">
                <text:p>68</text:p>
              </table:table-cell>
              <table:table-cell office:value-type="float" office:value="1.01679416021247">
                <text:p>1.0167941602124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2">
                <text:p>72</text:p>
              </table:table-cell>
              <table:table-cell office:value-type="float" office:value="1.0180354233123">
                <text:p>1.018035423312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6">
                <text:p>76</text:p>
              </table:table-cell>
              <table:table-cell office:value-type="float" office:value="1.01656512763708">
                <text:p>1.0165651276370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0">
                <text:p>80</text:p>
              </table:table-cell>
              <table:table-cell office:value-type="float" office:value="1.01104317115597">
                <text:p>1.0110431711559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4">
                <text:p>84</text:p>
              </table:table-cell>
              <table:table-cell office:value-type="float" office:value="1.0170745287271">
                <text:p>1.017074528727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8">
                <text:p>88</text:p>
              </table:table-cell>
              <table:table-cell office:value-type="float" office:value="1.01708531521929">
                <text:p>1.0170853152192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2">
                <text:p>92</text:p>
              </table:table-cell>
              <table:table-cell office:value-type="float" office:value="1.01759793726922">
                <text:p>1.0175979372692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6">
                <text:p>96</text:p>
              </table:table-cell>
              <table:table-cell office:value-type="float" office:value="1.01794627527883">
                <text:p>1.0179462752788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00">
                <text:p>100</text:p>
              </table:table-cell>
              <table:table-cell office:value-type="float" office:value="1.01847869374751">
                <text:p>1.0184786937475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04">
                <text:p>104</text:p>
              </table:table-cell>
              <table:table-cell office:value-type="float" office:value="1.01245744147378">
                <text:p>1.0124574414737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8">
                <text:p>108</text:p>
              </table:table-cell>
              <table:table-cell office:value-type="float" office:value="1.01745758935676">
                <text:p>1.0174575893567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12">
                <text:p>112</text:p>
              </table:table-cell>
              <table:table-cell office:value-type="float" office:value="1.01740361969829">
                <text:p>1.0174036196982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16">
                <text:p>116</text:p>
              </table:table-cell>
              <table:table-cell office:value-type="float" office:value="1.00878323296605">
                <text:p>1.0087832329660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20">
                <text:p>120</text:p>
              </table:table-cell>
              <table:table-cell office:value-type="float" office:value="1.01655165834579">
                <text:p>1.0165516583457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24">
                <text:p>124</text:p>
              </table:table-cell>
              <table:table-cell office:value-type="float" office:value="1.01664325656587">
                <text:p>1.0166432565658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symbol-type="automatic" chart:include-hidden-cells="false" chart:auto-position="true" chart:auto-size="true" chart:treat-empty-cells="use-zero"/>
    </style:style>
    <style:style style:name="ch3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'Aptos Narrow'" fo:font-size="9pt" style:font-family-asian="'Aptos Narrow'" style:font-size-asian="9pt" style:font-family-complex="'Aptos Narrow'" style:font-size-complex="9pt"/>
    </style:style>
    <style:style style:name="ch4" style:family="chart">
      <style:chart-properties chart:auto-position="true" style:rotation-angle="0"/>
      <style:text-properties fo:color="#000000" style:text-position="0% 100%" fo:font-family="'Aptos Narrow'" fo:font-size="10pt" style:font-family-asian="'Aptos Narrow'" style:font-size-asian="10pt" style:font-family-complex="'Aptos Narrow'" style:font-size-complex="10pt"/>
    </style:style>
    <style:style style:name="ch5" style:family="chart">
      <style:graphic-properties svg:stroke-width="0.018cm" svg:stroke-color="#b7b7b7"/>
    </style:style>
    <style:style style:name="ch6" style:family="chart">
      <style:chart-properties chart:auto-position="true" style:rotation-angle="90"/>
      <style:text-properties fo:color="#000000" style:text-position="0% 100%" fo:font-family="'Aptos Narrow'" fo:font-size="10pt" style:font-family-asian="'Aptos Narrow'" style:font-size-asian="10pt" style:font-family-complex="'Aptos Narrow'" style:font-size-complex="10pt"/>
    </style:style>
    <style:style style:name="ch7" style:family="chart" style:data-style-name="N0">
      <style:chart-properties chart:symbol-type="named-symbol" chart:symbol-name="circle" chart:symbol-width="0.247cm" chart:symbol-height="0.247cm" chart:link-data-style-to-source="true" chart:label-position="right">
        <chart:label-separator>
          <text:p>; </text:p>
        </chart:label-separator>
      </style:chart-properties>
      <style:graphic-properties draw:stroke="none" svg:stroke-width="0.053cm" svg:stroke-color="#156082" draw:fill-color="#156082"/>
      <style:text-properties fo:color="#000000" style:text-position="0% 100%" fo:font-family="'Aptos Narrow'" fo:font-size="10pt" style:font-family-asian="'Aptos Narrow'" style:font-size-asian="10pt" style:font-family-complex="'Aptos Narrow'" style:font-size-complex="10pt"/>
    </style:style>
    <style:style style:name="ch8" style:family="chart">
      <style:graphic-properties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3.626cm" svg:height="7.62cm" xlink:href=".." xlink:type="simple" chart:class="chart:scatter" chart:style-name="ch1">
        <chart:plot-area chart:style-name="ch2" table:cell-range-address="results_scalability.A2:results_scalability.A39 results_scalability.C2:results_scalability.C39" chart:data-source-has-labels="row" svg:x="1.332cm" svg:y="0.152cm" svg:width="12.022cm" svg:height="6.286cm">
          <chartooo:coordinate-region svg:x="2.412cm" svg:y="0.338cm" svg:width="10.702cm" svg:height="5.63cm"/>
          <chart:axis chart:dimension="x" chart:name="primary-x" chart:style-name="ch3">
            <chart:title svg:x="6.075cm" svg:y="6.591cm" chart:style-name="ch4">
              <text:p>Número de Hilos</text:p>
            </chart:title>
            <chart:grid chart:style-name="ch5" chart:class="major"/>
          </chart:axis>
          <chart:axis chart:dimension="y" chart:name="primary-y" chart:style-name="ch3">
            <chart:title svg:x="0.451cm" svg:y="4.471cm" chart:style-name="ch6">
              <text:p>Energía (Julios)</text:p>
            </chart:title>
            <chart:grid chart:style-name="ch5" chart:class="major"/>
          </chart:axis>
          <chart:series chart:style-name="ch7" chart:values-cell-range-address="results_scalability.C2:results_scalability.C39" loext:label-string="&quot;Energy(J)&quot;" chart:class="chart:scatter">
            <chart:domain table:cell-range-address="results_scalability.A2:results_scalability.A39"/>
            <chart:data-point chart:repeated="3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Energy(J)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results_scalability.A2:results_scalability.A39</svg:desc>
                </draw:g>
              </table:table-cell>
              <table:table-cell office:value-type="float" office:value="669923">
                <text:p>669923</text:p>
                <draw:g>
                  <svg:desc>results_scalability.C2:results_scalability.C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675561">
                <text:p>67556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670608">
                <text:p>67060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669178">
                <text:p>66917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704992">
                <text:p>70499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73071">
                <text:p>67307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673229">
                <text:p>67322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671688">
                <text:p>67168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">
                <text:p>12</text:p>
              </table:table-cell>
              <table:table-cell office:value-type="float" office:value="671468">
                <text:p>67146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6">
                <text:p>16</text:p>
              </table:table-cell>
              <table:table-cell office:value-type="float" office:value="673950">
                <text:p>67395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">
                <text:p>20</text:p>
              </table:table-cell>
              <table:table-cell office:value-type="float" office:value="670993">
                <text:p>67099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4">
                <text:p>24</text:p>
              </table:table-cell>
              <table:table-cell office:value-type="float" office:value="671392">
                <text:p>67139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8">
                <text:p>28</text:p>
              </table:table-cell>
              <table:table-cell office:value-type="float" office:value="668042">
                <text:p>66804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2">
                <text:p>32</text:p>
              </table:table-cell>
              <table:table-cell office:value-type="float" office:value="668754">
                <text:p>66875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6">
                <text:p>36</text:p>
              </table:table-cell>
              <table:table-cell office:value-type="float" office:value="701955">
                <text:p>70195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0">
                <text:p>40</text:p>
              </table:table-cell>
              <table:table-cell office:value-type="float" office:value="669281">
                <text:p>66928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4">
                <text:p>44</text:p>
              </table:table-cell>
              <table:table-cell office:value-type="float" office:value="673959">
                <text:p>67395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8">
                <text:p>48</text:p>
              </table:table-cell>
              <table:table-cell office:value-type="float" office:value="670527">
                <text:p>67052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2">
                <text:p>52</text:p>
              </table:table-cell>
              <table:table-cell office:value-type="float" office:value="671985">
                <text:p>67198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6">
                <text:p>56</text:p>
              </table:table-cell>
              <table:table-cell office:value-type="float" office:value="668874">
                <text:p>66887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6">
                <text:p>56</text:p>
              </table:table-cell>
              <table:table-cell office:value-type="float" office:value="672327">
                <text:p>67232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0">
                <text:p>60</text:p>
              </table:table-cell>
              <table:table-cell office:value-type="float" office:value="674200">
                <text:p>67420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4">
                <text:p>64</text:p>
              </table:table-cell>
              <table:table-cell office:value-type="float" office:value="670235">
                <text:p>67023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8">
                <text:p>68</text:p>
              </table:table-cell>
              <table:table-cell office:value-type="float" office:value="705989">
                <text:p>70598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2">
                <text:p>72</text:p>
              </table:table-cell>
              <table:table-cell office:value-type="float" office:value="686262">
                <text:p>68626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6">
                <text:p>76</text:p>
              </table:table-cell>
              <table:table-cell office:value-type="float" office:value="674995">
                <text:p>67499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0">
                <text:p>80</text:p>
              </table:table-cell>
              <table:table-cell office:value-type="float" office:value="671753">
                <text:p>67175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4">
                <text:p>84</text:p>
              </table:table-cell>
              <table:table-cell office:value-type="float" office:value="677978">
                <text:p>67797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8">
                <text:p>88</text:p>
              </table:table-cell>
              <table:table-cell office:value-type="float" office:value="709134">
                <text:p>70913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2">
                <text:p>92</text:p>
              </table:table-cell>
              <table:table-cell office:value-type="float" office:value="701895">
                <text:p>70189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6">
                <text:p>96</text:p>
              </table:table-cell>
              <table:table-cell office:value-type="float" office:value="698100">
                <text:p>69810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00">
                <text:p>100</text:p>
              </table:table-cell>
              <table:table-cell office:value-type="float" office:value="686703">
                <text:p>68670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04">
                <text:p>104</text:p>
              </table:table-cell>
              <table:table-cell office:value-type="float" office:value="707630">
                <text:p>70763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8">
                <text:p>108</text:p>
              </table:table-cell>
              <table:table-cell office:value-type="float" office:value="692573">
                <text:p>69257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12">
                <text:p>112</text:p>
              </table:table-cell>
              <table:table-cell office:value-type="float" office:value="706075">
                <text:p>70607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16">
                <text:p>116</text:p>
              </table:table-cell>
              <table:table-cell office:value-type="float" office:value="699506">
                <text:p>69950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20">
                <text:p>120</text:p>
              </table:table-cell>
              <table:table-cell office:value-type="float" office:value="699576">
                <text:p>69957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24">
                <text:p>124</text:p>
              </table:table-cell>
              <table:table-cell office:value-type="float" office:value="687714">
                <text:p>68771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'Aptos Narrow'" fo:font-size="9pt" style:font-family-asian="'Aptos Narrow'" style:font-size-asian="9pt" style:font-family-complex="'Aptos Narrow'" style:font-size-complex="9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'Aptos Narrow'" fo:font-size="9pt" style:font-family-asian="'Aptos Narrow'" style:font-size-asian="9pt" style:font-family-complex="'Aptos Narrow'" style:font-size-complex="9pt"/>
    </style:style>
    <style:style style:name="ch5" style:family="chart">
      <style:chart-properties chart:auto-position="true" style:rotation-angle="0"/>
      <style:text-properties fo:color="#000000" style:text-position="0% 100%" fo:font-family="'Aptos Narrow'" fo:font-size="10pt" style:font-family-asian="'Aptos Narrow'" style:font-size-asian="10pt" style:font-family-complex="'Aptos Narrow'" style:font-size-complex="10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'Aptos Narrow'" fo:font-size="9pt" style:font-family-asian="'Aptos Narrow'" style:font-size-asian="9pt" style:font-family-complex="'Aptos Narrow'" style:font-size-complex="9pt"/>
    </style:style>
    <style:style style:name="ch7" style:family="chart">
      <style:chart-properties chart:auto-position="true" style:rotation-angle="90"/>
      <style:text-properties fo:color="#000000" style:text-position="0% 100%" fo:font-family="'Aptos Narrow'" fo:font-size="10pt" style:font-family-asian="'Aptos Narrow'" style:font-size-asian="10pt" style:font-family-complex="'Aptos Narrow'" style:font-size-complex="10pt"/>
    </style:style>
    <style:style style:name="ch8" style:family="chart">
      <style:graphic-properties svg:stroke-width="0.018cm" svg:stroke-color="#b7b7b7"/>
    </style:style>
    <style:style style:name="ch9" style:family="chart" style:data-style-name="N0">
      <style:chart-properties chart:symbol-type="none" chart:link-data-style-to-source="true"/>
      <style:graphic-properties svg:stroke-width="0.079cm" svg:stroke-color="#156082" draw:fill-color="#156082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79cm" svg:stroke-color="#e97132" draw:fill-color="#e97132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79cm" svg:stroke-color="#196b24" draw:fill-color="#196b24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79cm" svg:stroke-color="#0f9ed5" draw:fill-color="#0f9ed5"/>
      <style:text-properties fo:font-size="10pt" style:font-size-asian="10pt" style:font-size-complex="10pt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14.896cm" svg:height="7.594cm" xlink:href=".." xlink:type="simple" chart:class="chart:line" chart:style-name="ch1">
        <chart:legend chart:legend-position="end" svg:x="12.676cm" svg:y="2.805cm" style:legend-expansion="high" chart:style-name="ch2"/>
        <chart:plot-area chart:style-name="ch3" table:cell-range-address="results_optimization.F18:results_optimization.J28" chart:data-source-has-labels="both" svg:x="1.357cm" svg:y="0.151cm" svg:width="11.022cm" svg:height="6.262cm">
          <chartooo:coordinate-region svg:x="1.776cm" svg:y="0.151cm" svg:width="10.472cm" svg:height="4.648cm"/>
          <chart:axis chart:dimension="x" chart:name="primary-x" chart:style-name="ch4" chartooo:axis-type="text">
            <chart:title svg:x="5.534cm" svg:y="6.565cm" chart:style-name="ch5">
              <text:p>Tamaño de Grano</text:p>
            </chart:title>
            <chart:categories table:cell-range-address="results_optimization.F18:results_optimization.F28"/>
          </chart:axis>
          <chart:axis chart:dimension="y" chart:name="primary-y" chart:style-name="ch6">
            <chart:title svg:x="0.451cm" svg:y="4.114cm" chart:style-name="ch7">
              <text:p>Tiempo (s)</text:p>
            </chart:title>
            <chart:grid chart:style-name="ch8" chart:class="major"/>
          </chart:axis>
          <chart:series chart:style-name="ch9" chart:values-cell-range-address="results_optimization.G18:results_optimization.G28" loext:label-string="&quot;affinity&quot;" chart:class="chart:line">
            <chart:data-point chart:repeated="11"/>
          </chart:series>
          <chart:series chart:style-name="ch10" chart:values-cell-range-address="results_optimization.H18:results_optimization.H28" loext:label-string="&quot;auto&quot;" chart:class="chart:line">
            <chart:data-point chart:repeated="11"/>
          </chart:series>
          <chart:series chart:style-name="ch11" chart:values-cell-range-address="results_optimization.I18:results_optimization.I28" loext:label-string="&quot;simple&quot;" chart:class="chart:line">
            <chart:data-point chart:repeated="11"/>
          </chart:series>
          <chart:series chart:style-name="ch12" chart:values-cell-range-address="results_optimization.J18:results_optimization.J28" loext:label-string="&quot;static&quot;" chart:class="chart:line">
            <chart:data-point chart:repeated="1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ffinity</text:p>
              </table:table-cell>
              <table:table-cell office:value-type="string">
                <text:p>auto</text:p>
              </table:table-cell>
              <table:table-cell office:value-type="string">
                <text:p>simple</text:p>
              </table:table-cell>
              <table:table-cell office:value-type="string">
                <text:p>static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results_optimization.F18:results_optimization.F28</svg:desc>
                </draw:g>
              </table:table-cell>
              <table:table-cell office:value-type="float" office:value="37.911">
                <text:p>37.911</text:p>
                <draw:g>
                  <svg:desc>results_optimization.G18:results_optimization.G28</svg:desc>
                </draw:g>
              </table:table-cell>
              <table:table-cell office:value-type="float" office:value="37.92">
                <text:p>37.92</text:p>
                <draw:g>
                  <svg:desc>results_optimization.H18:results_optimization.H28</svg:desc>
                </draw:g>
              </table:table-cell>
              <table:table-cell office:value-type="float" office:value="NaN">
                <text:p>NaN</text:p>
                <draw:g>
                  <svg:desc>results_optimization.I18:results_optimization.I28</svg:desc>
                </draw:g>
              </table:table-cell>
              <table:table-cell office:value-type="float" office:value="37.6929">
                <text:p>37.6929</text:p>
                <draw:g>
                  <svg:desc>results_optimization.J18:results_optimization.J28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37.7252">
                <text:p>37.7252</text:p>
              </table:table-cell>
              <table:table-cell office:value-type="float" office:value="37.862">
                <text:p>37.862</text:p>
              </table:table-cell>
              <table:table-cell office:value-type="float" office:value="37.7303">
                <text:p>37.7303</text:p>
              </table:table-cell>
              <table:table-cell office:value-type="float" office:value="37.7306">
                <text:p>37.7306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37.7405">
                <text:p>37.7405</text:p>
              </table:table-cell>
              <table:table-cell office:value-type="float" office:value="37.846">
                <text:p>37.846</text:p>
              </table:table-cell>
              <table:table-cell office:value-type="float" office:value="37.7107">
                <text:p>37.7107</text:p>
              </table:table-cell>
              <table:table-cell office:value-type="float" office:value="37.7542">
                <text:p>37.7542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37.6909">
                <text:p>37.6909</text:p>
              </table:table-cell>
              <table:table-cell office:value-type="float" office:value="38.118">
                <text:p>38.118</text:p>
              </table:table-cell>
              <table:table-cell office:value-type="float" office:value="37.6744">
                <text:p>37.6744</text:p>
              </table:table-cell>
              <table:table-cell office:value-type="float" office:value="37.8251">
                <text:p>37.8251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37.8039">
                <text:p>37.8039</text:p>
              </table:table-cell>
              <table:table-cell office:value-type="float" office:value="38.492">
                <text:p>38.492</text:p>
              </table:table-cell>
              <table:table-cell office:value-type="float" office:value="37.725">
                <text:p>37.725</text:p>
              </table:table-cell>
              <table:table-cell office:value-type="float" office:value="37.7922">
                <text:p>37.7922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37.7578">
                <text:p>37.7578</text:p>
              </table:table-cell>
              <table:table-cell office:value-type="float" office:value="38.445">
                <text:p>38.445</text:p>
              </table:table-cell>
              <table:table-cell office:value-type="float" office:value="37.719">
                <text:p>37.719</text:p>
              </table:table-cell>
              <table:table-cell office:value-type="float" office:value="37.6816">
                <text:p>37.6816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37.7389">
                <text:p>37.7389</text:p>
              </table:table-cell>
              <table:table-cell office:value-type="float" office:value="38.288">
                <text:p>38.288</text:p>
              </table:table-cell>
              <table:table-cell office:value-type="float" office:value="37.6836">
                <text:p>37.6836</text:p>
              </table:table-cell>
              <table:table-cell office:value-type="float" office:value="37.7746">
                <text:p>37.7746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37.7786">
                <text:p>37.7786</text:p>
              </table:table-cell>
              <table:table-cell office:value-type="float" office:value="37.912">
                <text:p>37.912</text:p>
              </table:table-cell>
              <table:table-cell office:value-type="float" office:value="37.7818">
                <text:p>37.7818</text:p>
              </table:table-cell>
              <table:table-cell office:value-type="float" office:value="37.7701">
                <text:p>37.7701</text:p>
              </table:table-cell>
            </table:table-row>
            <table:table-row>
              <table:table-cell office:value-type="float" office:value="2048">
                <text:p>2048</text:p>
              </table:table-cell>
              <table:table-cell office:value-type="float" office:value="37.6871">
                <text:p>37.6871</text:p>
              </table:table-cell>
              <table:table-cell office:value-type="float" office:value="37.858">
                <text:p>37.858</text:p>
              </table:table-cell>
              <table:table-cell office:value-type="float" office:value="37.7567">
                <text:p>37.7567</text:p>
              </table:table-cell>
              <table:table-cell office:value-type="float" office:value="37.7597">
                <text:p>37.7597</text:p>
              </table:table-cell>
            </table:table-row>
            <table:table-row>
              <table:table-cell office:value-type="float" office:value="4096">
                <text:p>4096</text:p>
              </table:table-cell>
              <table:table-cell office:value-type="float" office:value="37.7429">
                <text:p>37.7429</text:p>
              </table:table-cell>
              <table:table-cell office:value-type="float" office:value="38.282">
                <text:p>38.282</text:p>
              </table:table-cell>
              <table:table-cell office:value-type="float" office:value="37.7148">
                <text:p>37.7148</text:p>
              </table:table-cell>
              <table:table-cell office:value-type="float" office:value="37.7279">
                <text:p>37.7279</text:p>
              </table:table-cell>
            </table:table-row>
            <table:table-row>
              <table:table-cell office:value-type="string">
                <text:p>Grand Total</text:p>
              </table:table-cell>
              <table:table-cell office:value-type="float" office:value="37.75768">
                <text:p>37.75768</text:p>
              </table:table-cell>
              <table:table-cell office:value-type="float" office:value="38.1023">
                <text:p>38.1023</text:p>
              </table:table-cell>
              <table:table-cell office:value-type="float" office:value="37.7218111111111">
                <text:p>37.7218111111111</text:p>
              </table:table-cell>
              <table:table-cell office:value-type="float" office:value="37.75089">
                <text:p>37.7508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symbol-type="automatic" chart:include-hidden-cells="false" chart:auto-position="true" chart:auto-size="true" chart:treat-empty-cells="use-zero"/>
    </style:style>
    <style:style style:name="ch3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'Aptos Narrow'" fo:font-size="9pt" style:font-family-asian="'Aptos Narrow'" style:font-size-asian="9pt" style:font-family-complex="'Aptos Narrow'" style:font-size-complex="9pt"/>
    </style:style>
    <style:style style:name="ch4" style:family="chart">
      <style:graphic-properties svg:stroke-width="0.018cm" svg:stroke-color="#b7b7b7"/>
    </style:style>
    <style:style style:name="ch5" style:family="chart" style:data-style-name="N0">
      <style:chart-properties chart:symbol-type="named-symbol" chart:symbol-name="circle" chart:symbol-width="0.247cm" chart:symbol-height="0.247cm" chart:link-data-style-to-source="true" chart:label-position="right">
        <chart:label-separator>
          <text:p>; </text:p>
        </chart:label-separator>
      </style:chart-properties>
      <style:graphic-properties draw:stroke="none" svg:stroke-width="0.053cm" svg:stroke-color="#156082" draw:fill-color="#156082"/>
      <style:text-properties fo:color="#000000" style:text-position="0% 100%" fo:font-family="'Aptos Narrow'" fo:font-size="10pt" style:font-family-asian="'Aptos Narrow'" style:font-size-asian="10pt" style:font-family-complex="'Aptos Narrow'" style:font-size-complex="10pt"/>
    </style:style>
    <style:style style:name="ch6" style:family="chart">
      <style:graphic-properties draw:fill="solid" draw:fill-color="#ffffff"/>
    </style:style>
    <style:style style:name="ch7" style:family="chart">
      <style:graphic-properties draw:fill-color="#d9d9d9"/>
    </style:style>
  </office:automatic-styles>
  <office:body>
    <office:chart>
      <chart:chart svg:width="13.758cm" svg:height="7.594cm" xlink:href=".." xlink:type="simple" chart:class="chart:scatter" chart:style-name="ch1">
        <chart:plot-area chart:style-name="ch2" table:cell-range-address="results_optimization.C2:results_optimization.D40" chart:data-source-has-labels="row" svg:x="0.275cm" svg:y="0.151cm" svg:width="13.208cm" svg:height="7.292cm">
          <chartooo:coordinate-region svg:x="1.355cm" svg:y="0.337cm" svg:width="11.849cm" svg:height="6.636cm"/>
          <chart:axis chart:dimension="x" chart:name="primary-x" chart:style-name="ch3">
            <chart:grid chart:style-name="ch4" chart:class="major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results_optimization.D2:results_optimization.D40" loext:label-string="&quot;Energy(J)&quot;" chart:class="chart:scatter">
            <chart:domain table:cell-range-address="results_optimization.C2:results_optimization.C40"/>
            <chart:data-point chart:repeated="39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Energy(J)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7.92">
                <text:p>37.92</text:p>
                <draw:g>
                  <svg:desc>results_optimization.C2:results_optimization.C40</svg:desc>
                </draw:g>
              </table:table-cell>
              <table:table-cell office:value-type="float" office:value="720518">
                <text:p>720518</text:p>
                <draw:g>
                  <svg:desc>results_optimization.D2:results_optimization.D4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7.862">
                <text:p>37.862</text:p>
              </table:table-cell>
              <table:table-cell office:value-type="float" office:value="695748">
                <text:p>6957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7.846">
                <text:p>37.846</text:p>
              </table:table-cell>
              <table:table-cell office:value-type="float" office:value="707164">
                <text:p>7071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8.118">
                <text:p>38.118</text:p>
              </table:table-cell>
              <table:table-cell office:value-type="float" office:value="701812">
                <text:p>7018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8.492">
                <text:p>38.492</text:p>
              </table:table-cell>
              <table:table-cell office:value-type="float" office:value="723603">
                <text:p>72360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8.445">
                <text:p>38.445</text:p>
              </table:table-cell>
              <table:table-cell office:value-type="float" office:value="704042">
                <text:p>70404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8.288">
                <text:p>38.288</text:p>
              </table:table-cell>
              <table:table-cell office:value-type="float" office:value="683849">
                <text:p>68384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7.912">
                <text:p>37.912</text:p>
              </table:table-cell>
              <table:table-cell office:value-type="float" office:value="700867">
                <text:p>7008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7.858">
                <text:p>37.858</text:p>
              </table:table-cell>
              <table:table-cell office:value-type="float" office:value="704901">
                <text:p>70490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8.282">
                <text:p>38.282</text:p>
              </table:table-cell>
              <table:table-cell office:value-type="float" office:value="708583">
                <text:p>70858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7.7303">
                <text:p>37.7303</text:p>
              </table:table-cell>
              <table:table-cell office:value-type="float" office:value="706636">
                <text:p>70663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7.7107">
                <text:p>37.7107</text:p>
              </table:table-cell>
              <table:table-cell office:value-type="float" office:value="706283">
                <text:p>70628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7.6744">
                <text:p>37.6744</text:p>
              </table:table-cell>
              <table:table-cell office:value-type="float" office:value="706260">
                <text:p>70626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7.725">
                <text:p>37.725</text:p>
              </table:table-cell>
              <table:table-cell office:value-type="float" office:value="708809">
                <text:p>70880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7.719">
                <text:p>37.719</text:p>
              </table:table-cell>
              <table:table-cell office:value-type="float" office:value="707078">
                <text:p>70707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7.6836">
                <text:p>37.6836</text:p>
              </table:table-cell>
              <table:table-cell office:value-type="float" office:value="709984">
                <text:p>70998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7.7818">
                <text:p>37.7818</text:p>
              </table:table-cell>
              <table:table-cell office:value-type="float" office:value="704967">
                <text:p>70496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7.7567">
                <text:p>37.7567</text:p>
              </table:table-cell>
              <table:table-cell office:value-type="float" office:value="700203">
                <text:p>70020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7.7148">
                <text:p>37.7148</text:p>
              </table:table-cell>
              <table:table-cell office:value-type="float" office:value="704693">
                <text:p>70469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7.6929">
                <text:p>37.6929</text:p>
              </table:table-cell>
              <table:table-cell office:value-type="float" office:value="695874">
                <text:p>69587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7.7306">
                <text:p>37.7306</text:p>
              </table:table-cell>
              <table:table-cell office:value-type="float" office:value="706516">
                <text:p>70651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7.7542">
                <text:p>37.7542</text:p>
              </table:table-cell>
              <table:table-cell office:value-type="float" office:value="708832">
                <text:p>70883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7.8251">
                <text:p>37.8251</text:p>
              </table:table-cell>
              <table:table-cell office:value-type="float" office:value="710808">
                <text:p>71080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7.7922">
                <text:p>37.7922</text:p>
              </table:table-cell>
              <table:table-cell office:value-type="float" office:value="709225">
                <text:p>70922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7.6816">
                <text:p>37.6816</text:p>
              </table:table-cell>
              <table:table-cell office:value-type="float" office:value="683801">
                <text:p>68380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7.7746">
                <text:p>37.7746</text:p>
              </table:table-cell>
              <table:table-cell office:value-type="float" office:value="705999">
                <text:p>70599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7.7701">
                <text:p>37.7701</text:p>
              </table:table-cell>
              <table:table-cell office:value-type="float" office:value="694257">
                <text:p>69425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7.7597">
                <text:p>37.7597</text:p>
              </table:table-cell>
              <table:table-cell office:value-type="float" office:value="706819">
                <text:p>70681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7.7279">
                <text:p>37.7279</text:p>
              </table:table-cell>
              <table:table-cell office:value-type="float" office:value="705789">
                <text:p>70578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7.911">
                <text:p>37.911</text:p>
              </table:table-cell>
              <table:table-cell office:value-type="float" office:value="707948">
                <text:p>70794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7.7252">
                <text:p>37.7252</text:p>
              </table:table-cell>
              <table:table-cell office:value-type="float" office:value="703898">
                <text:p>70389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7.7405">
                <text:p>37.7405</text:p>
              </table:table-cell>
              <table:table-cell office:value-type="float" office:value="699672">
                <text:p>69967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7.6909">
                <text:p>37.6909</text:p>
              </table:table-cell>
              <table:table-cell office:value-type="float" office:value="695752">
                <text:p>69575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7.8039">
                <text:p>37.8039</text:p>
              </table:table-cell>
              <table:table-cell office:value-type="float" office:value="708986">
                <text:p>70898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7.7578">
                <text:p>37.7578</text:p>
              </table:table-cell>
              <table:table-cell office:value-type="float" office:value="673214">
                <text:p>67321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7.7389">
                <text:p>37.7389</text:p>
              </table:table-cell>
              <table:table-cell office:value-type="float" office:value="709656">
                <text:p>70965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.7786">
                <text:p>37.7786</text:p>
              </table:table-cell>
              <table:table-cell office:value-type="float" office:value="710550">
                <text:p>71055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.6871">
                <text:p>37.6871</text:p>
              </table:table-cell>
              <table:table-cell office:value-type="float" office:value="707791">
                <text:p>70779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7.7429">
                <text:p>37.7429</text:p>
              </table:table-cell>
              <table:table-cell office:value-type="float" office:value="705323">
                <text:p>70532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symbol-type="automatic" chart:include-hidden-cells="false" chart:auto-position="true" chart:auto-size="true" chart:treat-empty-cells="use-zero"/>
    </style:style>
    <style:style style:name="ch3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'Aptos Narrow'" fo:font-size="9pt" style:font-family-asian="'Aptos Narrow'" style:font-size-asian="9pt" style:font-family-complex="'Aptos Narrow'" style:font-size-complex="9pt"/>
    </style:style>
    <style:style style:name="ch4" style:family="chart">
      <style:chart-properties chart:auto-position="true" style:rotation-angle="0"/>
      <style:text-properties fo:color="#000000" style:text-position="0% 100%" fo:font-family="'Aptos Narrow'" fo:font-size="10pt" style:font-family-asian="'Aptos Narrow'" style:font-size-asian="10pt" style:font-family-complex="'Aptos Narrow'" style:font-size-complex="10pt"/>
    </style:style>
    <style:style style:name="ch5" style:family="chart">
      <style:graphic-properties svg:stroke-width="0.018cm" svg:stroke-color="#b7b7b7"/>
    </style:style>
    <style:style style:name="ch6" style:family="chart">
      <style:chart-properties chart:auto-position="true" style:rotation-angle="90"/>
      <style:text-properties fo:color="#000000" style:text-position="0% 100%" fo:font-family="'Aptos Narrow'" fo:font-size="10pt" style:font-family-asian="'Aptos Narrow'" style:font-size-asian="10pt" style:font-family-complex="'Aptos Narrow'" style:font-size-complex="10pt"/>
    </style:style>
    <style:style style:name="ch7" style:family="chart" style:data-style-name="N0">
      <style:chart-properties chart:symbol-type="named-symbol" chart:symbol-name="circle" chart:symbol-width="0.247cm" chart:symbol-height="0.247cm" chart:link-data-style-to-source="true" chart:label-position="right">
        <chart:label-separator>
          <text:p>; </text:p>
        </chart:label-separator>
      </style:chart-properties>
      <style:graphic-properties draw:stroke="none" svg:stroke-width="0.053cm" svg:stroke-color="#156082" draw:fill-color="#156082"/>
      <style:text-properties fo:color="#000000" style:text-position="0% 100%" fo:font-family="'Aptos Narrow'" fo:font-size="10pt" style:font-family-asian="'Aptos Narrow'" style:font-size-asian="10pt" style:font-family-complex="'Aptos Narrow'" style:font-size-complex="10pt"/>
    </style:style>
    <style:style style:name="ch8" style:family="chart">
      <style:graphic-properties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3.758cm" svg:height="14.658cm" xlink:href=".." xlink:type="simple" chart:class="chart:scatter" chart:style-name="ch1">
        <chart:plot-area chart:style-name="ch2" table:cell-range-address="results_grain_sweep.B2:results_grain_sweep.C34" chart:data-source-has-labels="row" svg:x="1.335cm" svg:y="0.293cm" svg:width="12.148cm" svg:height="13.042cm">
          <chartooo:coordinate-region svg:x="1.992cm" svg:y="0.479cm" svg:width="11.172cm" svg:height="12.386cm"/>
          <chart:axis chart:dimension="x" chart:name="primary-x" chart:style-name="ch3">
            <chart:title svg:x="6.101cm" svg:y="13.629cm" chart:style-name="ch4">
              <text:p>Tamaño de grano</text:p>
            </chart:title>
            <chart:grid chart:style-name="ch5" chart:class="major"/>
          </chart:axis>
          <chart:axis chart:dimension="y" chart:name="primary-y" chart:style-name="ch3">
            <chart:title svg:x="0.451cm" svg:y="7.646cm" chart:style-name="ch6">
              <text:p>Tiempo (s)</text:p>
            </chart:title>
            <chart:grid chart:style-name="ch5" chart:class="major"/>
          </chart:axis>
          <chart:series chart:style-name="ch7" chart:values-cell-range-address="results_grain_sweep.C2:results_grain_sweep.C34" loext:label-string="&quot;Time(s)&quot;" chart:class="chart:scatter">
            <chart:domain table:cell-range-address="results_grain_sweep.B2:results_grain_sweep.B34"/>
            <chart:data-point chart:repeated="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Time(s)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results_grain_sweep.B2:results_grain_sweep.B34</svg:desc>
                </draw:g>
              </table:table-cell>
              <table:table-cell office:value-type="float" office:value="38.13">
                <text:p>38.13</text:p>
                <draw:g>
                  <svg:desc>results_grain_sweep.C2:results_grain_sweep.C3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2">
                <text:p>32</text:p>
              </table:table-cell>
              <table:table-cell office:value-type="float" office:value="38.246">
                <text:p>38.24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4">
                <text:p>64</text:p>
              </table:table-cell>
              <table:table-cell office:value-type="float" office:value="38.371">
                <text:p>38.37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8">
                <text:p>128</text:p>
              </table:table-cell>
              <table:table-cell office:value-type="float" office:value="38.547">
                <text:p>38.54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6">
                <text:p>256</text:p>
              </table:table-cell>
              <table:table-cell office:value-type="float" office:value="38.079">
                <text:p>38.07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12">
                <text:p>512</text:p>
              </table:table-cell>
              <table:table-cell office:value-type="float" office:value="38.5555">
                <text:p>38.55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24">
                <text:p>1024</text:p>
              </table:table-cell>
              <table:table-cell office:value-type="float" office:value="38.526">
                <text:p>38.5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48">
                <text:p>2048</text:p>
              </table:table-cell>
              <table:table-cell office:value-type="float" office:value="38.635">
                <text:p>38.63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96">
                <text:p>4096</text:p>
              </table:table-cell>
              <table:table-cell office:value-type="float" office:value="38.6527">
                <text:p>38.652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